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 Mono" svg:font-family="'Roboto Mono', Consolas, 'Courier New', monospace"/>
  </office:font-face-decls>
  <office:automatic-styles>
    <style:style style:name="P1" style:family="paragraph" style:parent-style-name="Standard">
      <style:paragraph-properties fo:margin-left="0cm" fo:margin-right="0cm" style:line-height-at-least="0.476cm" fo:text-indent="0cm" style:auto-text-indent="false"/>
      <style:text-properties fo:color="#137333" loext:opacity="100%" style:font-name="Roboto Mono" fo:font-size="9.75pt" fo:font-weight="normal" officeooo:rsid="00123ee8" officeooo:paragraph-rsid="00123ee8" fo:background-color="#f8f9fa"/>
    </style:style>
    <style:style style:name="P2" style:family="paragraph" style:parent-style-name="Standard">
      <style:paragraph-properties fo:margin-left="0cm" fo:margin-right="0cm" style:line-height-at-least="0.476cm" fo:text-indent="0cm" style:auto-text-indent="false"/>
      <style:text-properties fo:color="#137333" loext:opacity="100%" style:font-name="Roboto Mono" fo:font-size="9.75pt" fo:font-weight="normal" fo:background-color="#f8f9fa"/>
    </style:style>
    <style:style style:name="P3" style:family="paragraph" style:parent-style-name="Standard">
      <style:paragraph-properties fo:margin-left="0cm" fo:margin-right="0cm" style:line-height-at-least="0.476cm" fo:text-indent="0cm" style:auto-text-indent="false"/>
      <style:text-properties fo:color="#137333" loext:opacity="100%" fo:background-color="#f8f9fa"/>
    </style:style>
    <style:style style:name="P4" style:family="paragraph" style:parent-style-name="Standard">
      <style:paragraph-properties fo:margin-left="0cm" fo:margin-right="0cm" style:line-height-at-least="0.476cm" fo:text-indent="0cm" style:auto-text-indent="false"/>
      <style:text-properties fo:color="#3c4043" loext:opacity="100%" style:font-name="Roboto Mono" fo:font-size="9.75pt" fo:font-weight="normal" fo:background-color="#f8f9fa"/>
    </style:style>
    <style:style style:name="P5" style:family="paragraph" style:parent-style-name="Standard">
      <style:paragraph-properties fo:margin-left="0cm" fo:margin-right="0cm" style:line-height-at-least="0.476cm" fo:text-indent="0cm" style:auto-text-indent="false"/>
      <style:text-properties fo:color="#3c4043" loext:opacity="100%" fo:background-color="#f8f9fa"/>
    </style:style>
    <style:style style:name="P6" style:family="paragraph" style:parent-style-name="Standard">
      <style:paragraph-properties style:line-height-at-least="0.476cm"/>
    </style:style>
    <style:style style:name="P7" style:family="paragraph" style:parent-style-name="Standard">
      <style:paragraph-properties fo:margin-left="0cm" fo:margin-right="0cm" style:line-height-at-least="0.476cm" fo:text-indent="0cm" style:auto-text-indent="false"/>
      <style:text-properties fo:color="#5f6368" loext:opacity="100%" style:font-name="Roboto Mono" fo:font-size="9.75pt" fo:font-weight="normal" fo:background-color="#f8f9fa"/>
    </style:style>
    <style:style style:name="P8" style:family="paragraph" style:parent-style-name="Standard">
      <style:paragraph-properties fo:margin-left="0cm" fo:margin-right="0cm" style:line-height-at-least="0.476cm" fo:text-indent="0cm" style:auto-text-indent="false"/>
      <style:text-properties fo:color="#5f6368" loext:opacity="100%" fo:background-color="#f8f9fa"/>
    </style:style>
    <style:style style:name="P9" style:family="paragraph" style:parent-style-name="Standard">
      <style:paragraph-properties fo:margin-top="0cm" fo:margin-bottom="0.499cm" style:contextual-spacing="false" style:line-height-at-least="0.476cm"/>
    </style:style>
    <style:style style:name="P10" style:family="paragraph" style:parent-style-name="Standard">
      <style:text-properties officeooo:rsid="00123ee8" officeooo:paragraph-rsid="00123ee8"/>
    </style:style>
    <style:style style:name="P11" style:family="paragraph" style:parent-style-name="Standard">
      <style:text-properties fo:color="#137333" loext:opacity="100%" style:font-name="Roboto Mono" fo:font-size="9.75pt" fo:font-weight="normal" officeooo:rsid="00123ee8" officeooo:paragraph-rsid="00123ee8" fo:background-color="#f8f9fa"/>
    </style:style>
    <style:style style:name="P12" style:family="paragraph" style:parent-style-name="Standard">
      <style:text-properties fo:color="#3c4043" loext:opacity="100%" style:font-name="Roboto Mono" fo:font-size="9.75pt" fo:font-weight="normal" officeooo:rsid="00123ee8" officeooo:paragraph-rsid="00123ee8" fo:background-color="#f8f9fa"/>
    </style:style>
    <style:style style:name="P13" style:family="paragraph" style:parent-style-name="Standard">
      <style:paragraph-properties style:line-height-at-least="0.476cm"/>
      <style:text-properties fo:color="#3c4043" loext:opacity="100%" style:font-name="Roboto Mono" fo:font-size="9.75pt" fo:font-weight="normal" fo:background-color="#f8f9fa"/>
    </style:style>
    <style:style style:name="T1" style:family="text">
      <style:text-properties style:font-name="Roboto Mono" fo:font-size="9.75pt" fo:font-weight="normal"/>
    </style:style>
    <style:style style:name="T2" style:family="text">
      <style:text-properties fo:color="#185abc" loext:opacity="100%"/>
    </style:style>
    <style:style style:name="T3" style:family="text">
      <style:text-properties fo:color="#000000" loext:opacity="100%"/>
    </style:style>
    <style:style style:name="T4" style:family="text">
      <style:text-properties fo:color="#185abc" loext:opacity="100%" style:font-name="Roboto Mono" fo:font-size="9.75pt" fo:font-weight="normal"/>
    </style:style>
    <style:style style:name="T5" style:family="text">
      <style:text-properties fo:color="#000000" loext:opacity="100%" style:font-name="Roboto Mono" fo:font-size="9.75pt" fo:font-weight="normal"/>
    </style:style>
    <style:style style:name="T6" style:family="text">
      <style:text-properties fo:color="#c92786" loext:opacity="100%" style:font-name="Roboto Mono" fo:font-size="9.75pt" fo:font-weight="normal"/>
    </style:style>
    <style:style style:name="T7" style:family="text">
      <style:text-properties fo:color="#b31412" loext:opacity="100%" style:font-name="Roboto Mono" fo:font-size="9.75pt" fo:font-weight="normal"/>
    </style:style>
    <style:style style:name="T8" style:family="text">
      <style:text-properties fo:color="#5f6368" loext:opacity="100%" style:font-name="Roboto Mono" fo:font-size="9.75pt" fo:font-weight="normal"/>
    </style:style>
    <style:style style:name="T9" style:family="text">
      <style:text-properties fo:color="#098591" loext:opacity="100%" style:font-name="Roboto Mono" fo:font-size="9.75pt" fo:font-weight="normal"/>
    </style:style>
    <style:style style:name="T10" style:family="text">
      <style:text-properties fo:color="#808080" loext:opacity="100%"/>
    </style:style>
    <style:style style:name="T11" style:family="text">
      <style:text-properties fo:color="#ff0000" loext:opacity="100%"/>
    </style:style>
    <style:style style:name="T12" style:family="text">
      <style:text-properties fo:color="#383838" loext:opacity="100%"/>
    </style:style>
    <style:style style:name="T13" style:family="text">
      <style:text-properties fo:color="#383838" loext:opacity="100%" style:font-name="Roboto Mono" fo:font-size="9.75pt" fo:font-weight="normal"/>
    </style:style>
    <style:style style:name="T14" style:family="text">
      <style:text-properties fo:color="#7627bb" loext:opacity="100%" style:font-name="Roboto Mono" fo:font-size="9.75pt" fo:font-weight="normal"/>
    </style:style>
    <style:style style:name="T15" style:family="text">
      <style:text-properties fo:color="#0451a5" loext:opacity="100%" style:font-name="Roboto Mono" fo:font-size="9.75pt" fo:font-weight="normal"/>
    </style:style>
    <style:style style:name="T16" style:family="text">
      <style:text-properties fo:color="#098658" loext:opacity="100%" style:font-name="Roboto Mono" fo:font-size="9.7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in.gs</text:p>
      <text:p text:style-name="P2">/**</text:p>
      <text:p text:style-name="P3"> <text:span text:style-name="T1">* FUNCIÓN ONOPEN</text:span></text:p>
      <text:p text:style-name="P3"> <text:span text:style-name="T1">* Se ejecuta automáticamente al abrir el Google Sheet.</text:span></text:p>
      <text:p text:style-name="P3"> <text:span text:style-name="T1">* Crea el menú personalizado en la parte superior.</text:span></text:p>
      <text:p text:style-name="P3"> <text:span text:style-name="T1">*/</text:span></text:p>
      <text:p text:style-name="P4"><text:span text:style-name="T2">function</text:span> <text:span text:style-name="T3">onOpen</text:span>() {</text:p>
      <text:p text:style-name="P5">  <text:span text:style-name="T4">const</text:span><text:span text:style-name="T1"> </text:span><text:span text:style-name="T5">ui</text:span><text:span text:style-name="T1"> = </text:span><text:span text:style-name="T6">SpreadsheetApp</text:span><text:span text:style-name="T1">.</text:span><text:span text:style-name="T5">getUi</text:span><text:span text:style-name="T1">();</text:span></text:p>
      <text:p text:style-name="P5">  </text:p>
      <text:p text:style-name="P5">  <text:span text:style-name="T5">ui</text:span><text:span text:style-name="T1">.</text:span><text:span text:style-name="T5">createMenu</text:span><text:span text:style-name="T1">(</text:span><text:span text:style-name="T7">'Procesamiento'</text:span><text:span text:style-name="T1">)</text:span></text:p>
      <text:p text:style-name="P5">    <text:span text:style-name="T1">.</text:span><text:span text:style-name="T5">addItem</text:span><text:span text:style-name="T1">(</text:span><text:span text:style-name="T7">'1. Generar Informe Churn'</text:span><text:span text:style-name="T1">, </text:span><text:span text:style-name="T7">'main'</text:span><text:span text:style-name="T1">) </text:span><text:span text:style-name="T8">// Procesa los datos</text:span></text:p>
      <text:p text:style-name="P5">    <text:span text:style-name="T1">.</text:span><text:span text:style-name="T5">addSeparator</text:span><text:span text:style-name="T1">() </text:span></text:p>
      <text:p text:style-name="P5">    <text:span text:style-name="T1">.</text:span><text:span text:style-name="T5">addItem</text:span><text:span text:style-name="T1">(</text:span><text:span text:style-name="T7">'2. Vista Previa y Envío'</text:span><text:span text:style-name="T1">, </text:span><text:span text:style-name="T7">'abrirVistaPrevia'</text:span><text:span text:style-name="T1">) </text:span><text:span text:style-name="T8">// Abre la ventana para enviar</text:span></text:p>
      <text:p text:style-name="P5">    <text:span text:style-name="T1">.</text:span><text:span text:style-name="T5">addToUi</text:span><text:span text:style-name="T1">();</text:span></text:p>
      <text:p text:style-name="P4">}</text:p>
      <text:p text:style-name="P6"/>
      <text:p text:style-name="P2">/**</text:p>
      <text:p text:style-name="P3"> <text:span text:style-name="T1">* FUNCIÓN PRINCIPAL (El Director de Orquesta)</text:span></text:p>
      <text:p text:style-name="P3"> <text:span text:style-name="T1">* Coordina las fases: Extraer -&gt; Transformar -&gt; Cargar -&gt; Mostrar Éxito</text:span></text:p>
      <text:p text:style-name="P3"> <text:span text:style-name="T1">*/</text:span></text:p>
      <text:p text:style-name="P4"><text:span text:style-name="T2">function</text:span> <text:span text:style-name="T3">main</text:span>() {</text:p>
      <text:p text:style-name="P5">  <text:span text:style-name="T6">Logger</text:span><text:span text:style-name="T1">.</text:span><text:span text:style-name="T5">log</text:span><text:span text:style-name="T1">(</text:span><text:span text:style-name="T7">"--- INICIANDO PROCESO ETL ---"</text:span><text:span text:style-name="T1">);</text:span></text:p>
      <text:p text:style-name="P6"/>
      <text:p text:style-name="P5">  <text:span text:style-name="T4">try</text:span><text:span text:style-name="T1"> {</text:span></text:p>
      <text:p text:style-name="P5">    <text:span text:style-name="T8">// 1. EXTRAER (E) - Ahora conecta directamente con el Data Lake de Drive</text:span></text:p>
      <text:p text:style-name="P5">    <text:span text:style-name="T4">const</text:span><text:span text:style-name="T1"> </text:span><text:span text:style-name="T5">datosCrudos</text:span><text:span text:style-name="T1"> = </text:span><text:span text:style-name="T5">extraerDatosCloud</text:span><text:span text:style-name="T1">();</text:span></text:p>
      <text:p text:style-name="P5">    <text:span text:style-name="T4">if</text:span><text:span text:style-name="T1"> (!</text:span><text:span text:style-name="T5">datosCrudos</text:span><text:span text:style-name="T1">) </text:span><text:span text:style-name="T4">return</text:span><text:span text:style-name="T1">; </text:span><text:span text:style-name="T8">// Si no hay datos, la función extraer ya lanzó el error</text:span></text:p>
      <text:p text:style-name="P6"/>
      <text:p text:style-name="P5">    <text:span text:style-name="T8">// 2. TRANSFORMAR (T)</text:span></text:p>
      <text:p text:style-name="P5">    <text:span text:style-name="T4">const</text:span><text:span text:style-name="T1"> </text:span><text:span text:style-name="T5">datosProcesados</text:span><text:span text:style-name="T1"> = </text:span><text:span text:style-name="T5">transformarDatos</text:span><text:span text:style-name="T1">(</text:span><text:span text:style-name="T5">datosCrudos</text:span><text:span text:style-name="T1">);</text:span></text:p>
      <text:p text:style-name="P6"/>
      <text:p text:style-name="P5">    <text:span text:style-name="T8">// 3. CARGAR (L)</text:span></text:p>
      <text:p text:style-name="P5">    <text:span text:style-name="T4">if</text:span><text:span text:style-name="T1"> (</text:span><text:span text:style-name="T5">datosProcesados</text:span><text:span text:style-name="T1"> &amp;&amp; </text:span><text:span text:style-name="T5">datosProcesados</text:span><text:span text:style-name="T1">.</text:span><text:span text:style-name="T5">length</text:span><text:span text:style-name="T1"> &gt; </text:span><text:span text:style-name="T9">1</text:span><text:span text:style-name="T1">) {</text:span></text:p>
      <text:p text:style-name="P5">      </text:p>
      <text:p text:style-name="P5">      <text:span text:style-name="T5">cargarDatos</text:span><text:span text:style-name="T1">(</text:span><text:span text:style-name="T5">datosProcesados</text:span><text:span text:style-name="T1">); </text:span></text:p>
      <text:p text:style-name="P6"/>
      <text:p text:style-name="P5">      <text:span text:style-name="T8">// 4. CONTROL DE CALIDAD Y MODAL</text:span></text:p>
      <text:p text:style-name="P5">      <text:span text:style-name="T6">Logger</text:span><text:span text:style-name="T1">.</text:span><text:span text:style-name="T5">log</text:span><text:span text:style-name="T1">(</text:span><text:span text:style-name="T7">"Ejemplo de cliente filtrado: "</text:span><text:span text:style-name="T1"> + </text:span><text:span text:style-name="T6">JSON</text:span><text:span text:style-name="T1">.</text:span><text:span text:style-name="T5">stringify</text:span><text:span text:style-name="T1">(</text:span><text:span text:style-name="T5">datosProcesados</text:span><text:span text:style-name="T1">[</text:span><text:span text:style-name="T9">1</text:span><text:span text:style-name="T1">]));</text:span></text:p>
      <text:p text:style-name="P5">      </text:p>
      <text:p text:style-name="P5">      <text:span text:style-name="T8">// Llamamos a la función que lanza la ventana HTML</text:span></text:p>
      <text:p text:style-name="P5">      <text:span text:style-name="T5">mostrarModalExito</text:span><text:span text:style-name="T1">(</text:span><text:span text:style-name="T5">datosProcesados</text:span><text:span text:style-name="T1">.</text:span><text:span text:style-name="T5">length</text:span><text:span text:style-name="T1">);</text:span></text:p>
      <text:p text:style-name="P5">      </text:p>
      <text:p text:style-name="P5">      <text:span text:style-name="T6">Logger</text:span><text:span text:style-name="T1">.</text:span><text:span text:style-name="T5">log</text:span><text:span text:style-name="T1">(</text:span><text:span text:style-name="T7">"--- PROCESO COMPLETADO CON ÉXITO ---"</text:span><text:span text:style-name="T1">);</text:span></text:p>
      <text:p text:style-name="P5">      </text:p>
      <text:p text:style-name="P5">    <text:span text:style-name="T1">} </text:span><text:span text:style-name="T4">else</text:span><text:span text:style-name="T1"> {</text:span></text:p>
      <text:p text:style-name="P5">      <text:span text:style-name="T6">SpreadsheetApp</text:span><text:span text:style-name="T1">.</text:span><text:span text:style-name="T5">getUi</text:span><text:span text:style-name="T1">().</text:span><text:span text:style-name="T5">alert</text:span><text:span text:style-name="T1">(</text:span><text:span text:style-name="T7">"No se encontraron clientes que cumplan el filtro (Churn = 1)."</text:span><text:span text:style-name="T1">);</text:span></text:p>
      <text:p text:style-name="P5">    <text:span text:style-name="T1">}</text:span></text:p>
      <text:p text:style-name="P6"/>
      <text:p text:style-name="P5">  <text:span text:style-name="T1">} </text:span><text:span text:style-name="T4">catch</text:span><text:span text:style-name="T1"> (</text:span><text:span text:style-name="T5">error</text:span><text:span text:style-name="T1">) {</text:span></text:p>
      <text:p text:style-name="P5">    <text:span text:style-name="T6">Logger</text:span><text:span text:style-name="T1">.</text:span><text:span text:style-name="T5">log</text:span><text:span text:style-name="T1">(</text:span><text:span text:style-name="T7">"ERROR CRÍTICO EN MAIN: "</text:span><text:span text:style-name="T1"> + </text:span><text:span text:style-name="T5">error</text:span><text:span text:style-name="T1">.</text:span><text:span text:style-name="T5">message</text:span><text:span text:style-name="T1">);</text:span></text:p>
      <text:p text:style-name="P5">    <text:span text:style-name="T6">SpreadsheetApp</text:span><text:span text:style-name="T1">.</text:span><text:span text:style-name="T5">getUi</text:span><text:span text:style-name="T1">().</text:span><text:span text:style-name="T5">alert</text:span><text:span text:style-name="T1">(</text:span><text:span text:style-name="T7">"Hubo un error en el proceso: "</text:span><text:span text:style-name="T1"> + </text:span><text:span text:style-name="T5">error</text:span><text:span text:style-name="T1">.</text:span><text:span text:style-name="T5">message</text:span><text:span text:style-name="T1">);</text:span></text:p>
      <text:p text:style-name="P5"><text:soft-page-break/>  <text:span text:style-name="T1">}</text:span></text:p>
      <text:p text:style-name="P4">}</text:p>
      <text:p text:style-name="P6"/>
      <text:p text:style-name="P2">/**</text:p>
      <text:p text:style-name="P3"> <text:span text:style-name="T1">* FASE E: EXTRACCIÓN (HISTÓRICA / COMENTADA PARA EVITAR PÉRDIDAS)</text:span></text:p>
      <text:p text:style-name="P3"> <text:span text:style-name="T1">*/</text:span></text:p>
      <text:p text:style-name="P7">/*</text:p>
      <text:p text:style-name="P7">function extraerDatos() {</text:p>
      <text:p text:style-name="P8">  <text:span text:style-name="T1">const libro = SpreadsheetApp.getActiveSpreadsheet();</text:span></text:p>
      <text:p text:style-name="P8">  <text:span text:style-name="T1">const hoja = libro.getSheetByName("Datos_Crudos");</text:span></text:p>
      <text:p text:style-name="P8">  </text:p>
      <text:p text:style-name="P8">  <text:span text:style-name="T1">if (!hoja) {</text:span></text:p>
      <text:p text:style-name="P8">    <text:span text:style-name="T1">SpreadsheetApp.getUi().alert("Error: No se encuentra la pestaña 'Datos_Crudos'.");</text:span></text:p>
      <text:p text:style-name="P8">    <text:span text:style-name="T1">return null;</text:span></text:p>
      <text:p text:style-name="P8">  <text:span text:style-name="T1">}</text:span></text:p>
      <text:p text:style-name="P8">  </text:p>
      <text:p text:style-name="P8">  <text:span text:style-name="T1">const matriz = hoja.getDataRange().getValues();</text:span></text:p>
      <text:p text:style-name="P8">  <text:span text:style-name="T1">return matriz;</text:span></text:p>
      <text:p text:style-name="P7">}</text:p>
      <text:p text:style-name="P7">*/</text:p>
      <text:p text:style-name="P6"/>
      <text:p text:style-name="P2">/**</text:p>
      <text:p text:style-name="P3"> <text:span text:style-name="T1">* FASE E NUEVA: EXTRACCIÓN DESDE LA NUBE</text:span></text:p>
      <text:p text:style-name="P3"> <text:span text:style-name="T1">*/</text:span></text:p>
      <text:p text:style-name="P4"><text:span text:style-name="T2">function</text:span> <text:span text:style-name="T3">extraerDatosCloud</text:span>() {</text:p>
      <text:p text:style-name="P5">  <text:span text:style-name="T8">// 1. Buscamos el archivo en nuestro "Data Lake" (Google Drive)</text:span></text:p>
      <text:p text:style-name="P5">  <text:span text:style-name="T4">var</text:span><text:span text:style-name="T1"> </text:span><text:span text:style-name="T5">nombreArchivo</text:span><text:span text:style-name="T1"> = </text:span><text:span text:style-name="T7">"datos_gimnasio_cloud.csv"</text:span><text:span text:style-name="T1">;</text:span></text:p>
      <text:p text:style-name="P5">  <text:span text:style-name="T4">var</text:span><text:span text:style-name="T1"> </text:span><text:span text:style-name="T5">iteradorArchivos</text:span><text:span text:style-name="T1"> = </text:span><text:span text:style-name="T6">DriveApp</text:span><text:span text:style-name="T1">.</text:span><text:span text:style-name="T5">getFilesByName</text:span><text:span text:style-name="T1">(</text:span><text:span text:style-name="T5">nombreArchivo</text:span><text:span text:style-name="T1">);</text:span></text:p>
      <text:p text:style-name="P5">  </text:p>
      <text:p text:style-name="P5">  <text:span text:style-name="T8">// Verificamos si el archivo existe</text:span></text:p>
      <text:p text:style-name="P5">  <text:span text:style-name="T4">if</text:span><text:span text:style-name="T1"> (</text:span><text:span text:style-name="T5">iteradorArchivos</text:span><text:span text:style-name="T1">.</text:span><text:span text:style-name="T5">hasNext</text:span><text:span text:style-name="T1">()) {</text:span></text:p>
      <text:p text:style-name="P5">    <text:span text:style-name="T4">var</text:span><text:span text:style-name="T1"> </text:span><text:span text:style-name="T5">archivo</text:span><text:span text:style-name="T1"> = </text:span><text:span text:style-name="T5">iteradorArchivos</text:span><text:span text:style-name="T1">.</text:span><text:span text:style-name="T5">next</text:span><text:span text:style-name="T1">();</text:span></text:p>
      <text:p text:style-name="P5">    </text:p>
      <text:p text:style-name="P5">    <text:span text:style-name="T8">// 2. Extraemos el contenido en formato texto puro</text:span></text:p>
      <text:p text:style-name="P5">    <text:span text:style-name="T4">var</text:span><text:span text:style-name="T1"> </text:span><text:span text:style-name="T5">contenidoTexto</text:span><text:span text:style-name="T1"> = </text:span><text:span text:style-name="T5">archivo</text:span><text:span text:style-name="T1">.</text:span><text:span text:style-name="T5">getBlob</text:span><text:span text:style-name="T1">().</text:span><text:span text:style-name="T5">getDataAsString</text:span><text:span text:style-name="T1">();</text:span></text:p>
      <text:p text:style-name="P5">    </text:p>
      <text:p text:style-name="P5">    <text:span text:style-name="T8">// 3. ¡LA MAGIA! Convertimos el texto CSV en una matriz bidimensional</text:span></text:p>
      <text:p text:style-name="P5">    <text:span text:style-name="T4">var</text:span><text:span text:style-name="T1"> </text:span><text:span text:style-name="T5">matrizDatos</text:span><text:span text:style-name="T1"> = </text:span><text:span text:style-name="T6">Utilities</text:span><text:span text:style-name="T1">.</text:span><text:span text:style-name="T5">parseCsv</text:span><text:span text:style-name="T1">(</text:span><text:span text:style-name="T5">contenidoTexto</text:span><text:span text:style-name="T1">);</text:span></text:p>
      <text:p text:style-name="P5">    </text:p>
      <text:p text:style-name="P5">    <text:span text:style-name="T6">Logger</text:span><text:span text:style-name="T1">.</text:span><text:span text:style-name="T5">log</text:span><text:span text:style-name="T1">(</text:span><text:span text:style-name="T7">"✅ Datos extraídos de la nube correctamente. Filas: "</text:span><text:span text:style-name="T1"> + </text:span><text:span text:style-name="T5">matrizDatos</text:span><text:span text:style-name="T1">.</text:span><text:span text:style-name="T5">length</text:span><text:span text:style-name="T1">);</text:span></text:p>
      <text:p text:style-name="P5">    </text:p>
      <text:p text:style-name="P5">    <text:span text:style-name="T8">// Devolvemos la matriz. A partir de aquí, vuestro código de Calcular.gs </text:span></text:p>
      <text:p text:style-name="P5">    <text:span text:style-name="T8">// funcionará EXACTAMENTE igual que antes, ¡porque la estructura es la misma!</text:span></text:p>
      <text:p text:style-name="P5">    <text:span text:style-name="T4">return</text:span><text:span text:style-name="T1"> </text:span><text:span text:style-name="T5">matrizDatos</text:span><text:span text:style-name="T1">;</text:span></text:p>
      <text:p text:style-name="P5">    </text:p>
      <text:p text:style-name="P5">  <text:span text:style-name="T1">} </text:span><text:span text:style-name="T4">else</text:span><text:span text:style-name="T1"> {</text:span></text:p>
      <text:p text:style-name="P5">    <text:span text:style-name="T6">Logger</text:span><text:span text:style-name="T1">.</text:span><text:span text:style-name="T5">log</text:span><text:span text:style-name="T1">(</text:span><text:span text:style-name="T7">"❌ ERROR: No se encontró el archivo en Drive. Revisa que estés usando el mismo correo."</text:span><text:span text:style-name="T1">);</text:span></text:p>
      <text:p text:style-name="P5">    <text:span text:style-name="T4">return</text:span><text:span text:style-name="T1"> </text:span><text:span text:style-name="T4">null</text:span><text:span text:style-name="T1">;</text:span></text:p>
      <text:p text:style-name="P5">  <text:span text:style-name="T1">}</text:span></text:p>
      <text:p text:style-name="P4">}</text:p>
      <text:p text:style-name="P9"/>
      <text:p text:style-name="P2"><text:soft-page-break/>/**</text:p>
      <text:p text:style-name="P3"> <text:span text:style-name="T1">* FUNCIÓN PARA MOSTRAR EL MODAL (La interfaz)</text:span></text:p>
      <text:p text:style-name="P3"> <text:span text:style-name="T1">* Conecta con VistaResumen.html</text:span></text:p>
      <text:p text:style-name="P3"> <text:span text:style-name="T1">*/</text:span></text:p>
      <text:p text:style-name="P4"><text:span text:style-name="T2">function</text:span> <text:span text:style-name="T3">mostrarModalExito</text:span>(<text:span text:style-name="T3">totalFilas</text:span>) {</text:p>
      <text:p text:style-name="P5">  <text:span text:style-name="T8">// Cargamos el archivo HTML</text:span></text:p>
      <text:p text:style-name="P5">  <text:span text:style-name="T4">const</text:span><text:span text:style-name="T1"> </text:span><text:span text:style-name="T5">template</text:span><text:span text:style-name="T1"> = </text:span><text:span text:style-name="T6">HtmlService</text:span><text:span text:style-name="T1">.</text:span><text:span text:style-name="T5">createTemplateFromFile</text:span><text:span text:style-name="T1">(</text:span><text:span text:style-name="T7">'VistaResumen'</text:span><text:span text:style-name="T1">);</text:span></text:p>
      <text:p text:style-name="P5">  </text:p>
      <text:p text:style-name="P5">  <text:span text:style-name="T8">// Pasamos el dato dinámico al HTML (restando la cabecera)</text:span></text:p>
      <text:p text:style-name="P5">  <text:span text:style-name="T5">template</text:span><text:span text:style-name="T1">.</text:span><text:span text:style-name="T5">cantidad</text:span><text:span text:style-name="T1"> = </text:span><text:span text:style-name="T5">totalFilas</text:span><text:span text:style-name="T1"> - </text:span><text:span text:style-name="T9">1</text:span><text:span text:style-name="T1">; </text:span></text:p>
      <text:p text:style-name="P5">  </text:p>
      <text:p text:style-name="P5">  <text:span text:style-name="T8">// Evaluamos la plantilla y configuramos la ventana</text:span></text:p>
      <text:p text:style-name="P5">  <text:span text:style-name="T4">const</text:span><text:span text:style-name="T1"> </text:span><text:span text:style-name="T5">html</text:span><text:span text:style-name="T1"> = </text:span><text:span text:style-name="T5">template</text:span><text:span text:style-name="T1">.</text:span><text:span text:style-name="T5">evaluate</text:span><text:span text:style-name="T1">()</text:span></text:p>
      <text:p text:style-name="P5">      <text:span text:style-name="T1">.</text:span><text:span text:style-name="T5">setWidth</text:span><text:span text:style-name="T1">(</text:span><text:span text:style-name="T9">400</text:span><text:span text:style-name="T1">)</text:span></text:p>
      <text:p text:style-name="P5">      <text:span text:style-name="T1">.</text:span><text:span text:style-name="T5">setHeight</text:span><text:span text:style-name="T1">(</text:span><text:span text:style-name="T9">300</text:span><text:span text:style-name="T1">)</text:span></text:p>
      <text:p text:style-name="P5">      <text:span text:style-name="T1">.</text:span><text:span text:style-name="T5">setTitle</text:span><text:span text:style-name="T1">(</text:span><text:span text:style-name="T7">'Informe Finalizado'</text:span><text:span text:style-name="T1">);</text:span></text:p>
      <text:p text:style-name="P5">      </text:p>
      <text:p text:style-name="P5">  <text:span text:style-name="T8">// Lanzamos el diálogo en la interfaz de Google Sheets</text:span></text:p>
      <text:p text:style-name="P5">  <text:span text:style-name="T6">SpreadsheetApp</text:span><text:span text:style-name="T1">.</text:span><text:span text:style-name="T5">getUi</text:span><text:span text:style-name="T1">().</text:span><text:span text:style-name="T5">showModalDialog</text:span><text:span text:style-name="T1">(</text:span><text:span text:style-name="T5">html</text:span><text:span text:style-name="T1">, </text:span><text:span text:style-name="T7">' '</text:span><text:span text:style-name="T1">);</text:span></text:p>
      <text:p text:style-name="P4">}</text:p>
      <text:p text:style-name="P6"/>
      <text:p text:style-name="P2">/**</text:p>
      <text:p text:style-name="P3"> <text:span text:style-name="T1">* SERVICIO WEB APP (Despliegue como enlace)</text:span></text:p>
      <text:p text:style-name="P3"> <text:span text:style-name="T1">*/</text:span></text:p>
      <text:p text:style-name="P4"><text:span text:style-name="T2">function</text:span> <text:span text:style-name="T3">doGet</text:span>() {</text:p>
      <text:p text:style-name="P5">  <text:span text:style-name="T4">const</text:span><text:span text:style-name="T1"> </text:span><text:span text:style-name="T5">metricas</text:span><text:span text:style-name="T1"> = </text:span><text:span text:style-name="T5">calcularMetricasDashboard</text:span><text:span text:style-name="T1">();</text:span></text:p>
      <text:p text:style-name="P5">  <text:span text:style-name="T4">const</text:span><text:span text:style-name="T1"> </text:span><text:span text:style-name="T5">template</text:span><text:span text:style-name="T1"> = </text:span><text:span text:style-name="T6">HtmlService</text:span><text:span text:style-name="T1">.</text:span><text:span text:style-name="T5">createTemplateFromFile</text:span><text:span text:style-name="T1">(</text:span><text:span text:style-name="T7">'Dashboard'</text:span><text:span text:style-name="T1">);</text:span></text:p>
      <text:p text:style-name="P5">  </text:p>
      <text:p text:style-name="P5">  <text:span text:style-name="T8">// Al ser false, el HTML mostrará el bloque "Dashboard Interactivo de Negocio"</text:span></text:p>
      <text:p text:style-name="P5">  <text:span text:style-name="T5">template</text:span><text:span text:style-name="T1">.</text:span><text:span text:style-name="T5">esResumenEmail</text:span><text:span text:style-name="T1"> = </text:span><text:span text:style-name="T4">false</text:span><text:span text:style-name="T1">; </text:span></text:p>
      <text:p text:style-name="P5">  </text:p>
      <text:p text:style-name="P5">  <text:span text:style-name="T8">// Importante: En la web no queremos que aparezca el botón de "Enviar Email"</text:span></text:p>
      <text:p text:style-name="P5">  <text:span text:style-name="T5">template</text:span><text:span text:style-name="T1">.</text:span><text:span text:style-name="T5">esVistaPrevia</text:span><text:span text:style-name="T1"> = </text:span><text:span text:style-name="T4">false</text:span><text:span text:style-name="T1">; </text:span></text:p>
      <text:p text:style-name="P6"/>
      <text:p text:style-name="P5">  <text:span text:style-name="T8">// Pasamos los datos del backend a la web (el puente)</text:span></text:p>
      <text:p text:style-name="P5">  <text:span text:style-name="T5">template</text:span><text:span text:style-name="T1">.</text:span><text:span text:style-name="T5">totalClientes</text:span><text:span text:style-name="T1"> = </text:span><text:span text:style-name="T5">metricas</text:span><text:span text:style-name="T1">.</text:span><text:span text:style-name="T5">total</text:span><text:span text:style-name="T1">;</text:span></text:p>
      <text:p text:style-name="P5">  <text:span text:style-name="T5">template</text:span><text:span text:style-name="T1">.</text:span><text:span text:style-name="T5">totalBajas</text:span><text:span text:style-name="T1"> = </text:span><text:span text:style-name="T5">metricas</text:span><text:span text:style-name="T1">.</text:span><text:span text:style-name="T5">bajas</text:span><text:span text:style-name="T1">;</text:span></text:p>
      <text:p text:style-name="P5">  <text:span text:style-name="T5">template</text:span><text:span text:style-name="T1">.</text:span><text:span text:style-name="T5">porcentajeChurn</text:span><text:span text:style-name="T1"> = </text:span><text:span text:style-name="T5">metricas</text:span><text:span text:style-name="T1">.</text:span><text:span text:style-name="T5">porcentaje</text:span><text:span text:style-name="T1">;</text:span></text:p>
      <text:p text:style-name="P5">  <text:span text:style-name="T5">template</text:span><text:span text:style-name="T1">.</text:span><text:span text:style-name="T5">colorAlerta</text:span><text:span text:style-name="T1"> = </text:span><text:span text:style-name="T5">metricas</text:span><text:span text:style-name="T1">.</text:span><text:span text:style-name="T5">color</text:span><text:span text:style-name="T1">;</text:span></text:p>
      <text:p text:style-name="P5">  </text:p>
      <text:p text:style-name="P5">  <text:span text:style-name="T8">// Añadimos los nuevos datos para que no aparezcan vacíos en las tarjetas</text:span></text:p>
      <text:p text:style-name="P5">  <text:span text:style-name="T5">template</text:span><text:span text:style-name="T1">.</text:span><text:span text:style-name="T5">mediaEdadBajas</text:span><text:span text:style-name="T1"> = </text:span><text:span text:style-name="T5">metricas</text:span><text:span text:style-name="T1">.</text:span><text:span text:style-name="T5">mediaEdadBajas</text:span><text:span text:style-name="T1">;</text:span></text:p>
      <text:p text:style-name="P5">  <text:span text:style-name="T5">template</text:span><text:span text:style-name="T1">.</text:span><text:span text:style-name="T5">contratoMensual</text:span><text:span text:style-name="T1"> = </text:span><text:span text:style-name="T5">metricas</text:span><text:span text:style-name="T1">.</text:span><text:span text:style-name="T5">contratoMensual</text:span><text:span text:style-name="T1">;</text:span></text:p>
      <text:p text:style-name="P5">  <text:span text:style-name="T5">template</text:span><text:span text:style-name="T1">.</text:span><text:span text:style-name="T5">contratoAnual</text:span><text:span text:style-name="T1"> = </text:span><text:span text:style-name="T5">metricas</text:span><text:span text:style-name="T1">.</text:span><text:span text:style-name="T5">contratoAnual</text:span><text:span text:style-name="T1">;</text:span></text:p>
      <text:p text:style-name="P5">  </text:p>
      <text:p text:style-name="P5">  <text:span text:style-name="T4">return</text:span><text:span text:style-name="T1"> </text:span><text:span text:style-name="T5">template</text:span><text:span text:style-name="T1">.</text:span><text:span text:style-name="T5">evaluate</text:span><text:span text:style-name="T1">()</text:span></text:p>
      <text:p text:style-name="P5">      <text:span text:style-name="T1">.</text:span><text:span text:style-name="T5">setTitle</text:span><text:span text:style-name="T1">(</text:span><text:span text:style-name="T7">'Dashboard de Bajas - Gym'</text:span><text:span text:style-name="T1">)</text:span></text:p>
      <text:p text:style-name="P5">      <text:span text:style-name="T1">.</text:span><text:span text:style-name="T5">addMetaTag</text:span><text:span text:style-name="T1">(</text:span><text:span text:style-name="T7">'viewport'</text:span><text:span text:style-name="T1">, </text:span><text:span text:style-name="T7">'width=device-width, initial-scale=1'</text:span><text:span text:style-name="T1">);</text:span></text:p>
      <text:p text:style-name="P4">}</text:p>
      <text:p text:style-name="P6"/>
      <text:p text:style-name="P7">// 1. FUNCIÓN PARA ABRIR LA VENTANA DE REVISIÓN</text:p>
      <text:p text:style-name="P4"><text:span text:style-name="T2">function</text:span> <text:span text:style-name="T3">abrirVistaPrevia</text:span>() {</text:p>
      <text:p text:style-name="P5"><text:soft-page-break/>  <text:span text:style-name="T4">const</text:span><text:span text:style-name="T1"> </text:span><text:span text:style-name="T5">metricas</text:span><text:span text:style-name="T1"> = </text:span><text:span text:style-name="T5">calcularMetricasDashboard</text:span><text:span text:style-name="T1">();</text:span></text:p>
      <text:p text:style-name="P5">  <text:span text:style-name="T4">const</text:span><text:span text:style-name="T1"> </text:span><text:span text:style-name="T5">template</text:span><text:span text:style-name="T1"> = </text:span><text:span text:style-name="T6">HtmlService</text:span><text:span text:style-name="T1">.</text:span><text:span text:style-name="T5">createTemplateFromFile</text:span><text:span text:style-name="T1">(</text:span><text:span text:style-name="T7">'Dashboard'</text:span><text:span text:style-name="T1">);</text:span></text:p>
      <text:p text:style-name="P5">  </text:p>
      <text:p text:style-name="P5">  <text:span text:style-name="T8">// Pasamos los datos</text:span></text:p>
      <text:p text:style-name="P5">  <text:span text:style-name="T5">template</text:span><text:span text:style-name="T1">.</text:span><text:span text:style-name="T5">esResumenEmail</text:span><text:span text:style-name="T1"> = </text:span><text:span text:style-name="T4">false</text:span><text:span text:style-name="T1">;</text:span></text:p>
      <text:p text:style-name="P5">  <text:span text:style-name="T5">template</text:span><text:span text:style-name="T1">.</text:span><text:span text:style-name="T5">totalClientes</text:span><text:span text:style-name="T1"> = </text:span><text:span text:style-name="T5">metricas</text:span><text:span text:style-name="T1">.</text:span><text:span text:style-name="T5">total</text:span><text:span text:style-name="T1">;</text:span></text:p>
      <text:p text:style-name="P5">  <text:span text:style-name="T5">template</text:span><text:span text:style-name="T1">.</text:span><text:span text:style-name="T5">totalBajas</text:span><text:span text:style-name="T1"> = </text:span><text:span text:style-name="T5">metricas</text:span><text:span text:style-name="T1">.</text:span><text:span text:style-name="T5">bajas</text:span><text:span text:style-name="T1">;</text:span></text:p>
      <text:p text:style-name="P5">  <text:span text:style-name="T5">template</text:span><text:span text:style-name="T1">.</text:span><text:span text:style-name="T5">porcentajeChurn</text:span><text:span text:style-name="T1"> = </text:span><text:span text:style-name="T5">metricas</text:span><text:span text:style-name="T1">.</text:span><text:span text:style-name="T5">porcentaje</text:span><text:span text:style-name="T1">;</text:span></text:p>
      <text:p text:style-name="P5">  <text:span text:style-name="T5">template</text:span><text:span text:style-name="T1">.</text:span><text:span text:style-name="T5">colorAlerta</text:span><text:span text:style-name="T1"> = </text:span><text:span text:style-name="T5">metricas</text:span><text:span text:style-name="T1">.</text:span><text:span text:style-name="T5">color</text:span><text:span text:style-name="T1">;</text:span></text:p>
      <text:p text:style-name="P5">  <text:span text:style-name="T5">template</text:span><text:span text:style-name="T1">.</text:span><text:span text:style-name="T5">mediaEdadBajas</text:span><text:span text:style-name="T1"> = </text:span><text:span text:style-name="T5">metricas</text:span><text:span text:style-name="T1">.</text:span><text:span text:style-name="T5">mediaEdadBajas</text:span><text:span text:style-name="T1">;</text:span></text:p>
      <text:p text:style-name="P5">  <text:span text:style-name="T5">template</text:span><text:span text:style-name="T1">.</text:span><text:span text:style-name="T5">contratoMensual</text:span><text:span text:style-name="T1"> = </text:span><text:span text:style-name="T5">metricas</text:span><text:span text:style-name="T1">.</text:span><text:span text:style-name="T5">contratoMensual</text:span><text:span text:style-name="T1">;</text:span></text:p>
      <text:p text:style-name="P5">  <text:span text:style-name="T5">template</text:span><text:span text:style-name="T1">.</text:span><text:span text:style-name="T5">contratoAnual</text:span><text:span text:style-name="T1"> = </text:span><text:span text:style-name="T5">metricas</text:span><text:span text:style-name="T1">.</text:span><text:span text:style-name="T5">contratoAnual</text:span><text:span text:style-name="T1">;</text:span></text:p>
      <text:p text:style-name="P5">  </text:p>
      <text:p text:style-name="P5">  <text:span text:style-name="T8">// ACTIVAMOS EL BOTÓN (Solo en Sheets)</text:span></text:p>
      <text:p text:style-name="P5">  <text:span text:style-name="T5">template</text:span><text:span text:style-name="T1">.</text:span><text:span text:style-name="T5">esVistaPrevia</text:span><text:span text:style-name="T1"> = </text:span><text:span text:style-name="T4">true</text:span><text:span text:style-name="T1">; </text:span></text:p>
      <text:p text:style-name="P5">  </text:p>
      <text:p text:style-name="P5">  <text:span text:style-name="T4">const</text:span><text:span text:style-name="T1"> </text:span><text:span text:style-name="T5">html</text:span><text:span text:style-name="T1"> = </text:span><text:span text:style-name="T5">template</text:span><text:span text:style-name="T1">.</text:span><text:span text:style-name="T5">evaluate</text:span><text:span text:style-name="T1">().</text:span><text:span text:style-name="T5">setWidth</text:span><text:span text:style-name="T1">(</text:span><text:span text:style-name="T9">850</text:span><text:span text:style-name="T1">).</text:span><text:span text:style-name="T5">setHeight</text:span><text:span text:style-name="T1">(</text:span><text:span text:style-name="T9">600</text:span><text:span text:style-name="T1">);</text:span></text:p>
      <text:p text:style-name="P5">  <text:span text:style-name="T6">SpreadsheetApp</text:span><text:span text:style-name="T1">.</text:span><text:span text:style-name="T5">getUi</text:span><text:span text:style-name="T1">().</text:span><text:span text:style-name="T5">showModalDialog</text:span><text:span text:style-name="T1">(</text:span><text:span text:style-name="T5">html</text:span><text:span text:style-name="T1">, </text:span><text:span text:style-name="T7">'Revisión de Informe antes de Envío'</text:span><text:span text:style-name="T1">);</text:span></text:p>
      <text:p text:style-name="P4">}</text:p>
      <text:p text:style-name="P6"/>
      <text:p text:style-name="P7">// 2. FUNCIÓN PARA ENVIAR EL EMAIL REAL</text:p>
      <text:p text:style-name="P4"><text:span text:style-name="T2">function</text:span> <text:span text:style-name="T3">enviarCorreoDashboard</text:span>() {</text:p>
      <text:p text:style-name="P5">  <text:span text:style-name="T4">const</text:span><text:span text:style-name="T1"> </text:span><text:span text:style-name="T5">metricas</text:span><text:span text:style-name="T1"> = </text:span><text:span text:style-name="T5">calcularMetricasDashboard</text:span><text:span text:style-name="T1">();</text:span></text:p>
      <text:p text:style-name="P5">  <text:span text:style-name="T4">const</text:span><text:span text:style-name="T1"> </text:span><text:span text:style-name="T5">template</text:span><text:span text:style-name="T1"> = </text:span><text:span text:style-name="T6">HtmlService</text:span><text:span text:style-name="T1">.</text:span><text:span text:style-name="T5">createTemplateFromFile</text:span><text:span text:style-name="T1">(</text:span><text:span text:style-name="T7">'Dashboard'</text:span><text:span text:style-name="T1">);</text:span></text:p>
      <text:p text:style-name="P5">  </text:p>
      <text:p text:style-name="P5">  <text:span text:style-name="T8">//--- PARÁMETROS PARA EL "HTML TRANSFORMISTA" ---</text:span></text:p>
      <text:p text:style-name="P5">  <text:span text:style-name="T5">template</text:span><text:span text:style-name="T1">.</text:span><text:span text:style-name="T5">esResumenEmail</text:span><text:span text:style-name="T1"> = </text:span><text:span text:style-name="T4">true</text:span><text:span text:style-name="T1">; </text:span><text:span text:style-name="T8">// Activamos el bloque corto para el correo</text:span></text:p>
      <text:p text:style-name="P5">  <text:span text:style-name="T5">template</text:span><text:span text:style-name="T1">.</text:span><text:span text:style-name="T5">urlAppWeb</text:span><text:span text:style-name="T1"> = </text:span><text:span text:style-name="T7">"https://script.google.com/macros/s/AKfycbyHIqBkFQ_WZqdBpTikN8gLlXpI7NLUQ9kcF8526ZzVndMe33AIRgqzG5XysSNzLJnM/exec"</text:span><text:span text:style-name="T1">; </text:span></text:p>
      <text:p text:style-name="P6"/>
      <text:p text:style-name="P5">  <text:span text:style-name="T8">// Inyectamos los datos en la plantilla (Inyectamos TODOS para que el HTML los use)</text:span></text:p>
      <text:p text:style-name="P5">  <text:span text:style-name="T5">template</text:span><text:span text:style-name="T1">.</text:span><text:span text:style-name="T5">totalBajas</text:span><text:span text:style-name="T1"> = </text:span><text:span text:style-name="T5">metricas</text:span><text:span text:style-name="T1">.</text:span><text:span text:style-name="T5">bajas</text:span><text:span text:style-name="T1">;</text:span></text:p>
      <text:p text:style-name="P5">  <text:span text:style-name="T5">template</text:span><text:span text:style-name="T1">.</text:span><text:span text:style-name="T5">porcentajeChurn</text:span><text:span text:style-name="T1"> = </text:span><text:span text:style-name="T5">metricas</text:span><text:span text:style-name="T1">.</text:span><text:span text:style-name="T5">porcentaje</text:span><text:span text:style-name="T1">;</text:span></text:p>
      <text:p text:style-name="P5">  <text:span text:style-name="T5">template</text:span><text:span text:style-name="T1">.</text:span><text:span text:style-name="T5">colorAlerta</text:span><text:span text:style-name="T1"> = </text:span><text:span text:style-name="T5">metricas</text:span><text:span text:style-name="T1">.</text:span><text:span text:style-name="T5">color</text:span><text:span text:style-name="T1">;</text:span></text:p>
      <text:p text:style-name="P5">  <text:span text:style-name="T5">template</text:span><text:span text:style-name="T1">.</text:span><text:span text:style-name="T5">mediaEdadBajas</text:span><text:span text:style-name="T1"> = </text:span><text:span text:style-name="T5">metricas</text:span><text:span text:style-name="T1">.</text:span><text:span text:style-name="T5">mediaEdadBajas</text:span><text:span text:style-name="T1">;</text:span></text:p>
      <text:p text:style-name="P5">  <text:span text:style-name="T5">template</text:span><text:span text:style-name="T1">.</text:span><text:span text:style-name="T5">contratoMensual</text:span><text:span text:style-name="T1"> = </text:span><text:span text:style-name="T5">metricas</text:span><text:span text:style-name="T1">.</text:span><text:span text:style-name="T5">contratoMensual</text:span><text:span text:style-name="T1">;</text:span></text:p>
      <text:p text:style-name="P5">  <text:span text:style-name="T5">template</text:span><text:span text:style-name="T1">.</text:span><text:span text:style-name="T5">totalClientes</text:span><text:span text:style-name="T1"> = </text:span><text:span text:style-name="T5">metricas</text:span><text:span text:style-name="T1">.</text:span><text:span text:style-name="T5">total</text:span><text:span text:style-name="T1">;</text:span></text:p>
      <text:p text:style-name="P6"/>
      <text:p text:style-name="P5">  <text:span text:style-name="T8">// Lógica para el asunto dinámico</text:span></text:p>
      <text:p text:style-name="P5">  <text:span text:style-name="T4">const</text:span><text:span text:style-name="T1"> </text:span><text:span text:style-name="T5">icono</text:span><text:span text:style-name="T1"> = </text:span><text:span text:style-name="T5">parseFloat</text:span><text:span text:style-name="T1">(</text:span><text:span text:style-name="T5">metricas</text:span><text:span text:style-name="T1">.</text:span><text:span text:style-name="T5">porcentaje</text:span><text:span text:style-name="T1">) &gt; </text:span><text:span text:style-name="T9">20</text:span><text:span text:style-name="T1"> ? </text:span><text:span text:style-name="T7">"⚠️"</text:span><text:span text:style-name="T1"> : </text:span><text:span text:style-name="T7">"✅"</text:span><text:span text:style-name="T1">;</text:span></text:p>
      <text:p text:style-name="P5">  <text:span text:style-name="T4">const</text:span><text:span text:style-name="T1"> </text:span><text:span text:style-name="T5">asuntoDinamico</text:span><text:span text:style-name="T1"> = </text:span><text:span text:style-name="T5">icono</text:span><text:span text:style-name="T1"> + </text:span><text:span text:style-name="T7">" Reporte Ejecutivo de Retención - Mayo 2026"</text:span><text:span text:style-name="T1">;</text:span></text:p>
      <text:p text:style-name="P5">  </text:p>
      <text:p text:style-name="P5">  <text:span text:style-name="T5">template</text:span><text:span text:style-name="T1">.</text:span><text:span text:style-name="T5">esVistaPrevia</text:span><text:span text:style-name="T1"> = </text:span><text:span text:style-name="T4">false</text:span><text:span text:style-name="T1">; </text:span></text:p>
      <text:p text:style-name="P5">  </text:p>
      <text:p text:style-name="P5">  <text:span text:style-name="T4">const</text:span><text:span text:style-name="T1"> </text:span><text:span text:style-name="T5">cuerpoHtml</text:span><text:span text:style-name="T1"> = </text:span><text:span text:style-name="T5">template</text:span><text:span text:style-name="T1">.</text:span><text:span text:style-name="T5">evaluate</text:span><text:span text:style-name="T1">().</text:span><text:span text:style-name="T5">getContent</text:span><text:span text:style-name="T1">();</text:span></text:p>
      <text:p text:style-name="P5">  </text:p>
      <text:p text:style-name="P5">  <text:span text:style-name="T8">// ENVIAR CORREO </text:span></text:p>
      <text:p text:style-name="P5">  <text:span text:style-name="T6">GmailApp</text:span><text:span text:style-name="T1">.</text:span><text:span text:style-name="T5">sendEmail</text:span><text:span text:style-name="T1">(</text:span></text:p>
      <text:p text:style-name="P5">    <text:span text:style-name="T7">"betcanillas@gmail.com, juanalberto.martos@opplus.bbva.com"</text:span><text:span text:style-name="T1">, </text:span></text:p>
      <text:p text:style-name="P5">    <text:span text:style-name="T5">asuntoDinamico</text:span><text:span text:style-name="T1">, </text:span></text:p>
      <text:p text:style-name="P5">    <text:span text:style-name="T7">"Tu cliente de correo no soporta HTML."</text:span><text:span text:style-name="T1">, </text:span></text:p>
      <text:p text:style-name="P5"><text:soft-page-break/>    <text:span text:style-name="T1">{ </text:span><text:span text:style-name="T5">htmlBody</text:span><text:span text:style-name="T1">: </text:span><text:span text:style-name="T5">cuerpoHtml</text:span><text:span text:style-name="T1"> }</text:span></text:p>
      <text:p text:style-name="P5">  <text:span text:style-name="T1">);</text:span></text:p>
      <text:p text:style-name="P6"/>
      <text:p text:style-name="P5">  <text:span text:style-name="T6">SpreadsheetApp</text:span><text:span text:style-name="T1">.</text:span><text:span text:style-name="T5">getUi</text:span><text:span text:style-name="T1">().</text:span><text:span text:style-name="T5">alert</text:span><text:span text:style-name="T1">(</text:span><text:span text:style-name="T7">'✅ Informe enviado correctamente a los stakeholders.'</text:span><text:span text:style-name="T1">);</text:span></text:p>
      <text:p text:style-name="P4">}</text:p>
      <text:p text:style-name="P6"/>
      <text:p text:style-name="P4"><text:span text:style-name="T2">function</text:span> <text:span text:style-name="T3">carreraVelocidadJS</text:span>() {</text:p>
      <text:p text:style-name="P5">  <text:span text:style-name="T4">var</text:span><text:span text:style-name="T1"> </text:span><text:span text:style-name="T5">datos</text:span><text:span text:style-name="T1"> = </text:span><text:span text:style-name="T5">extraerDatosCloud</text:span><text:span text:style-name="T1">(); </text:span><text:span text:style-name="T8">// Trae las 50.000 filas</text:span></text:p>
      <text:p text:style-name="P5">  <text:span text:style-name="T4">var</text:span><text:span text:style-name="T1"> </text:span><text:span text:style-name="T5">inicio</text:span><text:span text:style-name="T1"> = </text:span><text:span text:style-name="T4">new</text:span><text:span text:style-name="T1"> </text:span><text:span text:style-name="T6">Date</text:span><text:span text:style-name="T1">().</text:span><text:span text:style-name="T5">getTime</text:span><text:span text:style-name="T1">();</text:span></text:p>
      <text:p text:style-name="P5">  </text:p>
      <text:p text:style-name="P5">  <text:span text:style-name="T4">var</text:span><text:span text:style-name="T1"> </text:span><text:span text:style-name="T5">sumaEdad</text:span><text:span text:style-name="T1"> = </text:span><text:span text:style-name="T9">0</text:span><text:span text:style-name="T1">;</text:span></text:p>
      <text:p text:style-name="P5">  <text:span text:style-name="T4">var</text:span><text:span text:style-name="T1"> </text:span><text:span text:style-name="T5">totalFilas</text:span><text:span text:style-name="T1"> = </text:span><text:span text:style-name="T5">datos</text:span><text:span text:style-name="T1">.</text:span><text:span text:style-name="T5">length</text:span><text:span text:style-name="T1">;</text:span></text:p>
      <text:p text:style-name="P5">  </text:p>
      <text:p text:style-name="P5">  <text:span text:style-name="T8">// Recorremos las 50.000 filas con un bucle</text:span></text:p>
      <text:p text:style-name="P5">  <text:span text:style-name="T4">for</text:span><text:span text:style-name="T1"> (</text:span><text:span text:style-name="T4">var</text:span><text:span text:style-name="T1"> </text:span><text:span text:style-name="T5">i</text:span><text:span text:style-name="T1"> = </text:span><text:span text:style-name="T9">1</text:span><text:span text:style-name="T1">; </text:span><text:span text:style-name="T5">i</text:span><text:span text:style-name="T1"> &lt; </text:span><text:span text:style-name="T5">totalFilas</text:span><text:span text:style-name="T1">; </text:span><text:span text:style-name="T5">i</text:span><text:span text:style-name="T1">++) {</text:span></text:p>
      <text:p text:style-name="P5">    <text:span text:style-name="T5">sumaEdad</text:span><text:span text:style-name="T1"> += </text:span><text:span text:style-name="T6">Number</text:span><text:span text:style-name="T1">(</text:span><text:span text:style-name="T5">datos</text:span><text:span text:style-name="T1">[</text:span><text:span text:style-name="T5">i</text:span><text:span text:style-name="T1">][</text:span><text:span text:style-name="T9">0</text:span><text:span text:style-name="T1">]); </text:span><text:span text:style-name="T8">// La edad está en la primera columna</text:span></text:p>
      <text:p text:style-name="P5">  <text:span text:style-name="T1">}</text:span></text:p>
      <text:p text:style-name="P5">  </text:p>
      <text:p text:style-name="P5">  <text:span text:style-name="T4">var</text:span><text:span text:style-name="T1"> </text:span><text:span text:style-name="T5">promedio</text:span><text:span text:style-name="T1"> = </text:span><text:span text:style-name="T5">sumaEdad</text:span><text:span text:style-name="T1"> / (</text:span><text:span text:style-name="T5">totalFilas</text:span><text:span text:style-name="T1"> - </text:span><text:span text:style-name="T9">1</text:span><text:span text:style-name="T1">);</text:span></text:p>
      <text:p text:style-name="P5">  <text:span text:style-name="T4">var</text:span><text:span text:style-name="T1"> </text:span><text:span text:style-name="T5">fin</text:span><text:span text:style-name="T1"> = </text:span><text:span text:style-name="T4">new</text:span><text:span text:style-name="T1"> </text:span><text:span text:style-name="T6">Date</text:span><text:span text:style-name="T1">().</text:span><text:span text:style-name="T5">getTime</text:span><text:span text:style-name="T1">();</text:span></text:p>
      <text:p text:style-name="P5">  </text:p>
      <text:p text:style-name="P5">  <text:span text:style-name="T6">Logger</text:span><text:span text:style-name="T1">.</text:span><text:span text:style-name="T5">log</text:span><text:span text:style-name="T1">(</text:span><text:span text:style-name="T7">"🏁 JS - Promedio de edad: "</text:span><text:span text:style-name="T1"> + </text:span><text:span text:style-name="T5">promedio</text:span><text:span text:style-name="T1">.</text:span><text:span text:style-name="T5">toFixed</text:span><text:span text:style-name="T1">(</text:span><text:span text:style-name="T9">2</text:span><text:span text:style-name="T1">));</text:span></text:p>
      <text:p text:style-name="P5">  <text:span text:style-name="T6">Logger</text:span><text:span text:style-name="T1">.</text:span><text:span text:style-name="T5">log</text:span><text:span text:style-name="T1">(</text:span><text:span text:style-name="T7">"⏱️ JS - Tiempo invertido: "</text:span><text:span text:style-name="T1"> + (</text:span><text:span text:style-name="T5">fin</text:span><text:span text:style-name="T1"> - </text:span><text:span text:style-name="T5">inicio</text:span><text:span text:style-name="T1">) + </text:span><text:span text:style-name="T7">" milisegundos."</text:span><text:span text:style-name="T1">);</text:span></text:p>
      <text:p text:style-name="P4">}</text:p>
      <text:p text:style-name="Standard"/>
      <text:p text:style-name="Standard"/>
      <text:p text:style-name="Standard"/>
      <text:p text:style-name="P10">Calculo.gs</text:p>
      <text:p text:style-name="P11">/**</text:p>
      <text:p text:style-name="P3"> <text:span text:style-name="T1">* Fase 2: Transformación</text:span></text:p>
      <text:p text:style-name="P3"> <text:span text:style-name="T1">* Este archivo contiene la lógica matemática y de filtrado.</text:span></text:p>
      <text:p text:style-name="P3"> <text:span text:style-name="T1">*/</text:span></text:p>
      <text:p text:style-name="P4"><text:span text:style-name="T2">function</text:span> <text:span text:style-name="T3">transformarDatos</text:span>(<text:span text:style-name="T3">matriz</text:span>) {</text:p>
      <text:p text:style-name="P5">  <text:span text:style-name="T8">// 1. Separar la cabecera del cuerpo de datos</text:span></text:p>
      <text:p text:style-name="P5">  <text:span text:style-name="T4">const</text:span><text:span text:style-name="T1"> </text:span><text:span text:style-name="T5">cabecera</text:span><text:span text:style-name="T1"> = </text:span><text:span text:style-name="T5">matriz</text:span><text:span text:style-name="T1">[</text:span><text:span text:style-name="T9">0</text:span><text:span text:style-name="T1">];</text:span></text:p>
      <text:p text:style-name="P5">  <text:span text:style-name="T4">const</text:span><text:span text:style-name="T1"> </text:span><text:span text:style-name="T5">datos</text:span><text:span text:style-name="T1"> = </text:span><text:span text:style-name="T5">matriz</text:span><text:span text:style-name="T1">.</text:span><text:span text:style-name="T5">slice</text:span><text:span text:style-name="T1">(</text:span><text:span text:style-name="T9">1</text:span><text:span text:style-name="T1">);</text:span></text:p>
      <text:p text:style-name="P6"/>
      <text:p text:style-name="P5">  <text:span text:style-name="T8">// 2. Identificar índices de columnas</text:span></text:p>
      <text:p text:style-name="P5">  <text:span text:style-name="T4">const</text:span><text:span text:style-name="T1"> </text:span><text:span text:style-name="T5">idxChurn</text:span><text:span text:style-name="T1"> = </text:span><text:span text:style-name="T5">cabecera</text:span><text:span text:style-name="T1">.</text:span><text:span text:style-name="T5">indexOf</text:span><text:span text:style-name="T1">(</text:span><text:span text:style-name="T7">"Churn"</text:span><text:span text:style-name="T1">);</text:span></text:p>
      <text:p text:style-name="P5">  <text:span text:style-name="T4">const</text:span><text:span text:style-name="T1"> </text:span><text:span text:style-name="T5">idxAge</text:span><text:span text:style-name="T1"> = </text:span><text:span text:style-name="T5">cabecera</text:span><text:span text:style-name="T1">.</text:span><text:span text:style-name="T5">indexOf</text:span><text:span text:style-name="T1">(</text:span><text:span text:style-name="T7">"Age"</text:span><text:span text:style-name="T1">);</text:span></text:p>
      <text:p text:style-name="P5">  <text:span text:style-name="T4">const</text:span><text:span text:style-name="T1"> </text:span><text:span text:style-name="T5">idxContract</text:span><text:span text:style-name="T1"> = </text:span><text:span text:style-name="T5">cabecera</text:span><text:span text:style-name="T1">.</text:span><text:span text:style-name="T5">indexOf</text:span><text:span text:style-name="T1">(</text:span><text:span text:style-name="T7">"Contract_period"</text:span><text:span text:style-name="T1">);</text:span></text:p>
      <text:p text:style-name="P5">  <text:span text:style-name="T4">const</text:span><text:span text:style-name="T1"> </text:span><text:span text:style-name="T5">idxFrequency</text:span><text:span text:style-name="T1"> = </text:span><text:span text:style-name="T5">cabecera</text:span><text:span text:style-name="T1">.</text:span><text:span text:style-name="T5">indexOf</text:span><text:span text:style-name="T1">(</text:span><text:span text:style-name="T7">"Avg_class_frequency_total"</text:span><text:span text:style-name="T1">);</text:span></text:p>
      <text:p text:style-name="P6"/>
      <text:p text:style-name="P5">  <text:span text:style-name="T6">Logger</text:span><text:span text:style-name="T1">.</text:span><text:span text:style-name="T5">log</text:span><text:span text:style-name="T1">(</text:span><text:span text:style-name="T7">"--- FASE DE TRANSFORMACIÓN INICIADA ---"</text:span><text:span text:style-name="T1">);</text:span></text:p>
      <text:p text:style-name="P6"/>
      <text:p text:style-name="P5">  <text:span text:style-name="T8">// 3. FILTRAR: Solo usuarios que se dieron de baja (Churn == 1)</text:span></text:p>
      <text:p text:style-name="P5">  <text:span text:style-name="T4">const</text:span><text:span text:style-name="T1"> </text:span><text:span text:style-name="T5">filtrados</text:span><text:span text:style-name="T1"> = </text:span><text:span text:style-name="T5">datos</text:span><text:span text:style-name="T1">.</text:span><text:span text:style-name="T5">filter</text:span><text:span text:style-name="T1">(</text:span><text:span text:style-name="T5">fila</text:span><text:span text:style-name="T1"> =&gt; </text:span><text:span text:style-name="T5">fila</text:span><text:span text:style-name="T1">[</text:span><text:span text:style-name="T5">idxChurn</text:span><text:span text:style-name="T1">] == </text:span><text:span text:style-name="T9">1</text:span><text:span text:style-name="T1">);</text:span></text:p>
      <text:p text:style-name="P6"/>
      <text:p text:style-name="P5">  <text:span text:style-name="T8">// 4. MAPEAR: Seleccionar solo las columnas deseadas</text:span></text:p>
      <text:p text:style-name="P5">  <text:span text:style-name="T4">const</text:span><text:span text:style-name="T1"> </text:span><text:span text:style-name="T5">mapeados</text:span><text:span text:style-name="T1"> = </text:span><text:span text:style-name="T5">filtrados</text:span><text:span text:style-name="T1">.</text:span><text:span text:style-name="T5">map</text:span><text:span text:style-name="T1">(</text:span><text:span text:style-name="T5">fila</text:span><text:span text:style-name="T1"> =&gt; {</text:span></text:p>
      <text:p text:style-name="P5">    <text:span text:style-name="T4">return</text:span><text:span text:style-name="T1"> [</text:span></text:p>
      <text:p text:style-name="P5">      <text:span text:style-name="T5">fila</text:span><text:span text:style-name="T1">[</text:span><text:span text:style-name="T5">idxAge</text:span><text:span text:style-name="T1">],      </text:span></text:p>
      <text:p text:style-name="P5">      <text:span text:style-name="T5">fila</text:span><text:span text:style-name="T1">[</text:span><text:span text:style-name="T5">idxContract</text:span><text:span text:style-name="T1">],  </text:span></text:p>
      <text:p text:style-name="P5"><text:soft-page-break/>      <text:span text:style-name="T8">// .toFixed(2) lo convierte a texto con 2 decimales</text:span></text:p>
      <text:p text:style-name="P5">      <text:span text:style-name="T6">Number</text:span><text:span text:style-name="T1">(</text:span><text:span text:style-name="T5">fila</text:span><text:span text:style-name="T1">[</text:span><text:span text:style-name="T5">idxFrequency</text:span><text:span text:style-name="T1">]).</text:span><text:span text:style-name="T5">toFixed</text:span><text:span text:style-name="T1">(</text:span><text:span text:style-name="T9">2</text:span><text:span text:style-name="T1">) </text:span></text:p>
      <text:p text:style-name="P5">    <text:span text:style-name="T1">];</text:span></text:p>
      <text:p text:style-name="P5">  <text:span text:style-name="T1">});</text:span></text:p>
      <text:p text:style-name="P6"/>
      <text:p text:style-name="P5">  <text:span text:style-name="T8">// 5. Añadir nuevas cabeceras para el reporte final</text:span></text:p>
      <text:p text:style-name="P5">  <text:span text:style-name="T8">// --- GUARDAMOS LA ESTRUCTURA ORIGINAL EN COMENTARIOS ---</text:span></text:p>
      <text:p text:style-name="P5">  <text:span text:style-name="T8">// const resultadoFinal = [</text:span></text:p>
      <text:p text:style-name="P5">  <text:span text:style-name="T8">//   ["Edad", "Meses_Contrato", "Frecuencia_Clases"],</text:span></text:p>
      <text:p text:style-name="P5">  <text:span text:style-name="T8">//   ...mapeados</text:span></text:p>
      <text:p text:style-name="P5">  <text:span text:style-name="T8">// ];</text:span></text:p>
      <text:p text:style-name="P5">  </text:p>
      <text:p text:style-name="P5">  <text:span text:style-name="T8">// --- NUEVA ESTRUCTURA CLOUD: Guardamos el Total de Clientes de la nube en la cabecera para recuperarlo en el dashboard ---</text:span></text:p>
      <text:p text:style-name="P5">  <text:span text:style-name="T4">const</text:span><text:span text:style-name="T1"> </text:span><text:span text:style-name="T5">resultadoFinal</text:span><text:span text:style-name="T1"> = [</text:span></text:p>
      <text:p text:style-name="P5">    <text:span text:style-name="T1">[</text:span><text:span text:style-name="T7">"Edad"</text:span><text:span text:style-name="T1">, </text:span><text:span text:style-name="T7">"Meses_Contrato"</text:span><text:span text:style-name="T1">, </text:span><text:span text:style-name="T7">"Frecuencia_Clases"</text:span><text:span text:style-name="T1">, </text:span><text:span text:style-name="T7">"Total_Clientes_Cloud"</text:span><text:span text:style-name="T1">],</text:span></text:p>
      <text:p text:style-name="P5">    <text:span text:style-name="T1">...</text:span><text:span text:style-name="T5">mapeados</text:span><text:span text:style-name="T1">.</text:span><text:span text:style-name="T5">map</text:span><text:span text:style-name="T1">((</text:span><text:span text:style-name="T5">fila</text:span><text:span text:style-name="T1">, </text:span><text:span text:style-name="T5">index</text:span><text:span text:style-name="T1">) =&gt; </text:span><text:span text:style-name="T5">index</text:span><text:span text:style-name="T1"> === </text:span><text:span text:style-name="T9">0</text:span><text:span text:style-name="T1"> ? [...</text:span><text:span text:style-name="T5">fila</text:span><text:span text:style-name="T1">, </text:span><text:span text:style-name="T5">matriz</text:span><text:span text:style-name="T1">.</text:span><text:span text:style-name="T5">length</text:span><text:span text:style-name="T1"> - </text:span><text:span text:style-name="T9">1</text:span><text:span text:style-name="T1">] : [...</text:span><text:span text:style-name="T5">fila</text:span><text:span text:style-name="T1">, </text:span><text:span text:style-name="T7">""</text:span><text:span text:style-name="T1">])</text:span></text:p>
      <text:p text:style-name="P5">  <text:span text:style-name="T1">];</text:span></text:p>
      <text:p text:style-name="P6"/>
      <text:p text:style-name="P5">  <text:span text:style-name="T6">Logger</text:span><text:span text:style-name="T1">.</text:span><text:span text:style-name="T5">log</text:span><text:span text:style-name="T1">(</text:span><text:span text:style-name="T7">"Filas después de filtrar (Churn=1): "</text:span><text:span text:style-name="T1"> + </text:span><text:span text:style-name="T5">filtrados</text:span><text:span text:style-name="T1">.</text:span><text:span text:style-name="T5">length</text:span><text:span text:style-name="T1">);</text:span></text:p>
      <text:p text:style-name="P5">  <text:span text:style-name="T6">Logger</text:span><text:span text:style-name="T1">.</text:span><text:span text:style-name="T5">log</text:span><text:span text:style-name="T1">(</text:span><text:span text:style-name="T7">"--- FASE DE TRANSFORMACIÓN COMPLETADA ---"</text:span><text:span text:style-name="T1">);</text:span></text:p>
      <text:p text:style-name="P6"/>
      <text:p text:style-name="P5">  <text:span text:style-name="T4">return</text:span><text:span text:style-name="T1"> </text:span><text:span text:style-name="T5">resultadoFinal</text:span><text:span text:style-name="T1">;</text:span></text:p>
      <text:p text:style-name="P4">} </text:p>
      <text:p text:style-name="P6"/>
      <text:p text:style-name="P4"><text:span text:style-name="T2">function</text:span> <text:span text:style-name="T3">cargarDatos</text:span>(<text:span text:style-name="T3">datos</text:span>) {</text:p>
      <text:p text:style-name="P5">  <text:span text:style-name="T8">// 1. Usamos nuestra función auxiliar para preparar la hoja</text:span></text:p>
      <text:p text:style-name="P5">  <text:span text:style-name="T4">const</text:span><text:span text:style-name="T1"> </text:span><text:span text:style-name="T5">hojaDestino</text:span><text:span text:style-name="T1"> = </text:span><text:span text:style-name="T5">obtenerOCrearHoja</text:span><text:span text:style-name="T1">(</text:span><text:span text:style-name="T7">"Resultados_Churn"</text:span><text:span text:style-name="T1">);</text:span></text:p>
      <text:p text:style-name="P6"/>
      <text:p text:style-name="P5">  <text:span text:style-name="T8">// 2. Limpiamos la hoja antes de volcar para evitar que queden datos residuales viejos</text:span></text:p>
      <text:p text:style-name="P5">  <text:span text:style-name="T5">hojaDestino</text:span><text:span text:style-name="T1">.</text:span><text:span text:style-name="T5">clearContents</text:span><text:span text:style-name="T1">();</text:span></text:p>
      <text:p text:style-name="P6"/>
      <text:p text:style-name="P5">  <text:span text:style-name="T8">// 3. Calculamos las dimensiones de nuestra matriz de datos</text:span></text:p>
      <text:p text:style-name="P5">  <text:span text:style-name="T4">const</text:span><text:span text:style-name="T1"> </text:span><text:span text:style-name="T5">filas</text:span><text:span text:style-name="T1"> = </text:span><text:span text:style-name="T5">datos</text:span><text:span text:style-name="T1">.</text:span><text:span text:style-name="T5">length</text:span><text:span text:style-name="T1">;</text:span></text:p>
      <text:p text:style-name="P5">  <text:span text:style-name="T4">const</text:span><text:span text:style-name="T1"> </text:span><text:span text:style-name="T5">columnas</text:span><text:span text:style-name="T1"> = </text:span><text:span text:style-name="T5">datos</text:span><text:span text:style-name="T1">[</text:span><text:span text:style-name="T9">0</text:span><text:span text:style-name="T1">].</text:span><text:span text:style-name="T5">length</text:span><text:span text:style-name="T1">;</text:span></text:p>
      <text:p text:style-name="P6"/>
      <text:p text:style-name="P5">  <text:span text:style-name="T8">// 4. Volcamos los datos de golpe</text:span></text:p>
      <text:p text:style-name="P5">  <text:span text:style-name="T5">hojaDestino</text:span><text:span text:style-name="T1">.</text:span><text:span text:style-name="T5">getRange</text:span><text:span text:style-name="T1">(</text:span><text:span text:style-name="T9">1</text:span><text:span text:style-name="T1">, </text:span><text:span text:style-name="T9">1</text:span><text:span text:style-name="T1">, </text:span><text:span text:style-name="T5">filas</text:span><text:span text:style-name="T1">, </text:span><text:span text:style-name="T5">columnas</text:span><text:span text:style-name="T1">).</text:span><text:span text:style-name="T5">setValues</text:span><text:span text:style-name="T1">(</text:span><text:span text:style-name="T5">datos</text:span><text:span text:style-name="T1">);</text:span></text:p>
      <text:p text:style-name="P6"/>
      <text:p text:style-name="P5">  <text:span text:style-name="T8">// Le damos un poco de estilo a la cabecera</text:span></text:p>
      <text:p text:style-name="P5">  <text:span text:style-name="T5">hojaDestino</text:span><text:span text:style-name="T1">.</text:span><text:span text:style-name="T5">getRange</text:span><text:span text:style-name="T1">(</text:span><text:span text:style-name="T9">1</text:span><text:span text:style-name="T1">, </text:span><text:span text:style-name="T9">1</text:span><text:span text:style-name="T1">, </text:span><text:span text:style-name="T9">1</text:span><text:span text:style-name="T1">, </text:span><text:span text:style-name="T5">columnas</text:span><text:span text:style-name="T1">).</text:span><text:span text:style-name="T5">setFontWeight</text:span><text:span text:style-name="T1">(</text:span><text:span text:style-name="T7">"bold"</text:span><text:span text:style-name="T1">).</text:span><text:span text:style-name="T5">setBackground</text:span><text:span text:style-name="T1">(</text:span><text:span text:style-name="T7">"#d9ead3"</text:span><text:span text:style-name="T1">);</text:span></text:p>
      <text:p text:style-name="P5">  </text:p>
      <text:p text:style-name="P5">  <text:span text:style-name="T6">Logger</text:span><text:span text:style-name="T1">.</text:span><text:span text:style-name="T5">log</text:span><text:span text:style-name="T1">(</text:span><text:span text:style-name="T7">"--- FASE DE CARGA (L) COMPLETADA CON ÉXITO ---"</text:span><text:span text:style-name="T1">);</text:span></text:p>
      <text:p text:style-name="P4">}</text:p>
      <text:p text:style-name="P6"/>
      <text:p text:style-name="P4"><text:span text:style-name="T2">function</text:span> <text:span text:style-name="T3">calcularMetricasDashboard</text:span>() {</text:p>
      <text:p text:style-name="P5">  <text:span text:style-name="T4">const</text:span><text:span text:style-name="T1"> </text:span><text:span text:style-name="T5">ss</text:span><text:span text:style-name="T1"> = </text:span><text:span text:style-name="T6">SpreadsheetApp</text:span><text:span text:style-name="T1">.</text:span><text:span text:style-name="T5">getActiveSpreadsheet</text:span><text:span text:style-name="T1">();</text:span></text:p>
      <text:p text:style-name="P5">  </text:p>
      <text:p text:style-name="P5">  <text:span text:style-name="T8">// 1. HOJA DE RESULTADOS (De aquí leeremos TODO ahora)</text:span></text:p>
      <text:p text:style-name="P5">  <text:span text:style-name="T4">const</text:span><text:span text:style-name="T1"> </text:span><text:span text:style-name="T5">hojaResultados</text:span><text:span text:style-name="T1"> = </text:span><text:span text:style-name="T5">ss</text:span><text:span text:style-name="T1">.</text:span><text:span text:style-name="T5">getSheetByName</text:span><text:span text:style-name="T1">(</text:span><text:span text:style-name="T7">"Resultados_Churn"</text:span><text:span text:style-name="T1">);</text:span></text:p>
      <text:p text:style-name="P5">  <text:span text:style-name="T4">if</text:span><text:span text:style-name="T1"> (!</text:span><text:span text:style-name="T5">hojaResultados</text:span><text:span text:style-name="T1">) {</text:span></text:p>
      <text:p text:style-name="P5"><text:soft-page-break/>    <text:span text:style-name="T5">console</text:span><text:span text:style-name="T1">.</text:span><text:span text:style-name="T5">error</text:span><text:span text:style-name="T1">(</text:span><text:span text:style-name="T7">"Error: No se encontró la hoja 'Resultados_Churn'"</text:span><text:span text:style-name="T1">);</text:span></text:p>
      <text:p text:style-name="P5">    <text:span text:style-name="T4">return</text:span><text:span text:style-name="T1"> { </text:span><text:span text:style-name="T5">total</text:span><text:span text:style-name="T1">: </text:span><text:span text:style-name="T9">0</text:span><text:span text:style-name="T1">, </text:span><text:span text:style-name="T5">bajas</text:span><text:span text:style-name="T1">: </text:span><text:span text:style-name="T9">0</text:span><text:span text:style-name="T1">, </text:span><text:span text:style-name="T5">porcentaje</text:span><text:span text:style-name="T1">: </text:span><text:span text:style-name="T7">"0%"</text:span><text:span text:style-name="T1">, </text:span><text:span text:style-name="T5">color</text:span><text:span text:style-name="T1">: </text:span><text:span text:style-name="T7">"grey"</text:span><text:span text:style-name="T1">, </text:span><text:span text:style-name="T5">mediaEdadBajas</text:span><text:span text:style-name="T1">: </text:span><text:span text:style-name="T9">0</text:span><text:span text:style-name="T1">, </text:span><text:span text:style-name="T5">contratoMensual</text:span><text:span text:style-name="T1">: </text:span><text:span text:style-name="T9">0</text:span><text:span text:style-name="T1">, </text:span><text:span text:style-name="T5">contratoAnual</text:span><text:span text:style-name="T1">: </text:span><text:span text:style-name="T9">0</text:span><text:span text:style-name="T1"> };</text:span></text:p>
      <text:p text:style-name="P5">  <text:span text:style-name="T1">}</text:span></text:p>
      <text:p text:style-name="P5">  </text:p>
      <text:p text:style-name="P5">  <text:span text:style-name="T4">const</text:span><text:span text:style-name="T1"> </text:span><text:span text:style-name="T5">datosResultados</text:span><text:span text:style-name="T1"> = </text:span><text:span text:style-name="T5">hojaResultados</text:span><text:span text:style-name="T1">.</text:span><text:span text:style-name="T5">getDataRange</text:span><text:span text:style-name="T1">().</text:span><text:span text:style-name="T5">getValues</text:span><text:span text:style-name="T1">();</text:span></text:p>
      <text:p text:style-name="P5">  <text:span text:style-name="T4">if</text:span><text:span text:style-name="T1"> (</text:span><text:span text:style-name="T5">datosResultados</text:span><text:span text:style-name="T1">.</text:span><text:span text:style-name="T5">length</text:span><text:span text:style-name="T1"> &lt;= </text:span><text:span text:style-name="T9">1</text:span><text:span text:style-name="T1">) {</text:span></text:p>
      <text:p text:style-name="P5">    <text:span text:style-name="T4">return</text:span><text:span text:style-name="T1"> { </text:span><text:span text:style-name="T5">total</text:span><text:span text:style-name="T1">: </text:span><text:span text:style-name="T9">0</text:span><text:span text:style-name="T1">, </text:span><text:span text:style-name="T5">bajas</text:span><text:span text:style-name="T1">: </text:span><text:span text:style-name="T9">0</text:span><text:span text:style-name="T1">, </text:span><text:span text:style-name="T5">porcentaje</text:span><text:span text:style-name="T1">: </text:span><text:span text:style-name="T7">"0%"</text:span><text:span text:style-name="T1">, </text:span><text:span text:style-name="T5">color</text:span><text:span text:style-name="T1">: </text:span><text:span text:style-name="T7">"grey"</text:span><text:span text:style-name="T1">, </text:span><text:span text:style-name="T5">mediaEdadBajas</text:span><text:span text:style-name="T1">: </text:span><text:span text:style-name="T9">0</text:span><text:span text:style-name="T1">, </text:span><text:span text:style-name="T5">contratoMensual</text:span><text:span text:style-name="T1">: </text:span><text:span text:style-name="T9">0</text:span><text:span text:style-name="T1">, </text:span><text:span text:style-name="T5">contratoAnual</text:span><text:span text:style-name="T1">: </text:span><text:span text:style-name="T9">0</text:span><text:span text:style-name="T1"> };</text:span></text:p>
      <text:p text:style-name="P5">  <text:span text:style-name="T1">}</text:span></text:p>
      <text:p text:style-name="P6"/>
      <text:p text:style-name="P5">  <text:span text:style-name="T4">const</text:span><text:span text:style-name="T1"> </text:span><text:span text:style-name="T5">cabeceraResultados</text:span><text:span text:style-name="T1"> = </text:span><text:span text:style-name="T5">datosResultados</text:span><text:span text:style-name="T1">[</text:span><text:span text:style-name="T9">0</text:span><text:span text:style-name="T1">];</text:span></text:p>
      <text:p text:style-name="P5">  <text:span text:style-name="T4">const</text:span><text:span text:style-name="T1"> </text:span><text:span text:style-name="T5">totalBajas</text:span><text:span text:style-name="T1"> = </text:span><text:span text:style-name="T5">datosResultados</text:span><text:span text:style-name="T1">.</text:span><text:span text:style-name="T5">length</text:span><text:span text:style-name="T1"> - </text:span><text:span text:style-name="T9">1</text:span><text:span text:style-name="T1">;</text:span></text:p>
      <text:p text:style-name="P6"/>
      <text:p text:style-name="P5">  <text:span text:style-name="T8">// --- CÓDIGO ANTIGUO COMENTADO (Buscaba en la pestaña estática antigua) ---</text:span></text:p>
      <text:p text:style-name="P5">  <text:span text:style-name="T8">/*</text:span></text:p>
      <text:p text:style-name="P8">  <text:span text:style-name="T1">const hojaOriginal = ss.getSheetByName("Datos_Crudos");</text:span></text:p>
      <text:p text:style-name="P8">  <text:span text:style-name="T1">if (!hojaOriginal) {</text:span></text:p>
      <text:p text:style-name="P8">    <text:span text:style-name="T1">console.error("Error: No se encontró la hoja 'Datos_Crudos'");</text:span></text:p>
      <text:p text:style-name="P8">    <text:span text:style-name="T1">return { total: 0, bajas: 0, porcentaje: "0%", color: "grey", mediaEdadBajas: 0, contratoMensual: 0, contratoAnual: 0 };</text:span></text:p>
      <text:p text:style-name="P8">  <text:span text:style-name="T1">}</text:span></text:p>
      <text:p text:style-name="P8">  <text:span text:style-name="T1">const datosCrudos = hojaOriginal.getDataRange().getValues();</text:span></text:p>
      <text:p text:style-name="P8">  <text:span text:style-name="T1">const cabecera = datosCrudos[0];</text:span></text:p>
      <text:p text:style-name="P8">  <text:span text:style-name="T1">const totalClientes = datosCrudos.length - 1;</text:span></text:p>
      <text:p text:style-name="P8">  <text:span text:style-name="T1">const idxEdad = cabecera.indexOf("Age");</text:span></text:p>
      <text:p text:style-name="P8">  <text:span text:style-name="T1">const idxContrato = cabecera.indexOf("Contract_period");</text:span></text:p>
      <text:p text:style-name="P8">  <text:span text:style-name="T1">const idxChurn = cabecera.indexOf("Churn");</text:span></text:p>
      <text:p text:style-name="P8">  <text:span text:style-name="T1">*/</text:span></text:p>
      <text:p text:style-name="P6"/>
      <text:p text:style-name="P5">  <text:span text:style-name="T8">// --- NUEVA LÓGICA CLOUD DIRECTA DESDE LA HOJA DE RESULTADOS ---</text:span></text:p>
      <text:p text:style-name="P5">  <text:span text:style-name="T4">const</text:span><text:span text:style-name="T1"> </text:span><text:span text:style-name="T5">idxEdad</text:span><text:span text:style-name="T1"> = </text:span><text:span text:style-name="T5">cabeceraResultados</text:span><text:span text:style-name="T1">.</text:span><text:span text:style-name="T5">indexOf</text:span><text:span text:style-name="T1">(</text:span><text:span text:style-name="T7">"Edad"</text:span><text:span text:style-name="T1">);</text:span></text:p>
      <text:p text:style-name="P5">  <text:span text:style-name="T4">const</text:span><text:span text:style-name="T1"> </text:span><text:span text:style-name="T5">idxContrato</text:span><text:span text:style-name="T1"> = </text:span><text:span text:style-name="T5">cabeceraResultados</text:span><text:span text:style-name="T1">.</text:span><text:span text:style-name="T5">indexOf</text:span><text:span text:style-name="T1">(</text:span><text:span text:style-name="T7">"Meses_Contrato"</text:span><text:span text:style-name="T1">);</text:span></text:p>
      <text:p text:style-name="P5">  <text:span text:style-name="T4">const</text:span><text:span text:style-name="T1"> </text:span><text:span text:style-name="T5">idxTotalCloud</text:span><text:span text:style-name="T1"> = </text:span><text:span text:style-name="T5">cabeceraResultados</text:span><text:span text:style-name="T1">.</text:span><text:span text:style-name="T5">indexOf</text:span><text:span text:style-name="T1">(</text:span><text:span text:style-name="T7">"Total_Clientes_Cloud"</text:span><text:span text:style-name="T1">);</text:span></text:p>
      <text:p text:style-name="P6"/>
      <text:p text:style-name="P5">  <text:span text:style-name="T8">// Recuperamos el total de clientes de la muestra de la nube que guardamos en la primera fila de datos</text:span></text:p>
      <text:p text:style-name="P5">  <text:span text:style-name="T4">const</text:span><text:span text:style-name="T1"> </text:span><text:span text:style-name="T5">totalClientes</text:span><text:span text:style-name="T1"> = </text:span><text:span text:style-name="T6">Number</text:span><text:span text:style-name="T1">(</text:span><text:span text:style-name="T5">datosResultados</text:span><text:span text:style-name="T1">[</text:span><text:span text:style-name="T9">1</text:span><text:span text:style-name="T1">][</text:span><text:span text:style-name="T5">idxTotalCloud</text:span><text:span text:style-name="T1">]) || </text:span><text:span text:style-name="T9">150</text:span><text:span text:style-name="T1">; </text:span></text:p>
      <text:p text:style-name="P6"/>
      <text:p text:style-name="P5">  <text:span text:style-name="T4">let</text:span><text:span text:style-name="T1"> </text:span><text:span text:style-name="T5">sumaEdades</text:span><text:span text:style-name="T1"> = </text:span><text:span text:style-name="T9">0</text:span><text:span text:style-name="T1">;</text:span></text:p>
      <text:p text:style-name="P5">  <text:span text:style-name="T4">let</text:span><text:span text:style-name="T1"> </text:span><text:span text:style-name="T5">mensual</text:span><text:span text:style-name="T1"> = </text:span><text:span text:style-name="T9">0</text:span><text:span text:style-name="T1">;</text:span></text:p>
      <text:p text:style-name="P5">  <text:span text:style-name="T4">let</text:span><text:span text:style-name="T1"> </text:span><text:span text:style-name="T5">anual</text:span><text:span text:style-name="T1"> = </text:span><text:span text:style-name="T9">0</text:span><text:span text:style-name="T1">;</text:span></text:p>
      <text:p text:style-name="P6"/>
      <text:p text:style-name="P5">  <text:span text:style-name="T4">const</text:span><text:span text:style-name="T1"> </text:span><text:span text:style-name="T5">filasDatos</text:span><text:span text:style-name="T1"> = </text:span><text:span text:style-name="T5">datosResultados</text:span><text:span text:style-name="T1">.</text:span><text:span text:style-name="T5">slice</text:span><text:span text:style-name="T1">(</text:span><text:span text:style-name="T9">1</text:span><text:span text:style-name="T1">);</text:span></text:p>
      <text:p text:style-name="P5">  </text:p>
      <text:p text:style-name="P5">  <text:span text:style-name="T5">filasDatos</text:span><text:span text:style-name="T1">.</text:span><text:span text:style-name="T5">forEach</text:span><text:span text:style-name="T1">(</text:span><text:span text:style-name="T5">fila</text:span><text:span text:style-name="T1"> =&gt; {</text:span></text:p>
      <text:p text:style-name="P5">    <text:span text:style-name="T8">// Como esta hoja YA está filtrada con Churn = 1, procesamos todas las filas directamente</text:span></text:p>
      <text:p text:style-name="P5">    <text:span text:style-name="T5">sumaEdades</text:span><text:span text:style-name="T1"> += </text:span><text:span text:style-name="T6">Number</text:span><text:span text:style-name="T1">(</text:span><text:span text:style-name="T5">fila</text:span><text:span text:style-name="T1">[</text:span><text:span text:style-name="T5">idxEdad</text:span><text:span text:style-name="T1">]) || </text:span><text:span text:style-name="T9">0</text:span><text:span text:style-name="T1">;</text:span></text:p>
      <text:p text:style-name="P5">    <text:span text:style-name="T4">const</text:span><text:span text:style-name="T1"> </text:span><text:span text:style-name="T5">mesesContrato</text:span><text:span text:style-name="T1"> = </text:span><text:span text:style-name="T6">Number</text:span><text:span text:style-name="T1">(</text:span><text:span text:style-name="T5">fila</text:span><text:span text:style-name="T1">[</text:span><text:span text:style-name="T5">idxContrato</text:span><text:span text:style-name="T1">]);</text:span></text:p>
      <text:p text:style-name="P5">    </text:p>
      <text:p text:style-name="P5">    <text:span text:style-name="T4">if</text:span><text:span text:style-name="T1"> (</text:span><text:span text:style-name="T5">mesesContrato</text:span><text:span text:style-name="T1"> &gt;= </text:span><text:span text:style-name="T9">12</text:span><text:span text:style-name="T1">) {</text:span></text:p>
      <text:p text:style-name="P5"><text:soft-page-break/>      <text:span text:style-name="T5">anual</text:span><text:span text:style-name="T1">++;</text:span></text:p>
      <text:p text:style-name="P5">    <text:span text:style-name="T1">} </text:span><text:span text:style-name="T4">else</text:span><text:span text:style-name="T1"> {</text:span></text:p>
      <text:p text:style-name="P5">      <text:span text:style-name="T5">mensual</text:span><text:span text:style-name="T1">++;</text:span></text:p>
      <text:p text:style-name="P5">    <text:span text:style-name="T1">}</text:span></text:p>
      <text:p text:style-name="P5">  <text:span text:style-name="T1">});</text:span></text:p>
      <text:p text:style-name="P6"/>
      <text:p text:style-name="P5">  <text:span text:style-name="T4">const</text:span><text:span text:style-name="T1"> </text:span><text:span text:style-name="T5">mediaEdad</text:span><text:span text:style-name="T1"> = </text:span><text:span text:style-name="T5">totalBajas</text:span><text:span text:style-name="T1"> &gt; </text:span><text:span text:style-name="T9">0</text:span><text:span text:style-name="T1"> ? (</text:span><text:span text:style-name="T5">sumaEdades</text:span><text:span text:style-name="T1"> / </text:span><text:span text:style-name="T5">totalBajas</text:span><text:span text:style-name="T1">).</text:span><text:span text:style-name="T5">toFixed</text:span><text:span text:style-name="T1">(</text:span><text:span text:style-name="T9">0</text:span><text:span text:style-name="T1">) : </text:span><text:span text:style-name="T9">0</text:span><text:span text:style-name="T1">;</text:span></text:p>
      <text:p text:style-name="P5">  <text:span text:style-name="T4">const</text:span><text:span text:style-name="T1"> </text:span><text:span text:style-name="T5">porcentajeNum</text:span><text:span text:style-name="T1"> = </text:span><text:span text:style-name="T5">totalClientes</text:span><text:span text:style-name="T1"> &gt; </text:span><text:span text:style-name="T9">0</text:span><text:span text:style-name="T1"> ? (</text:span><text:span text:style-name="T5">totalBajas</text:span><text:span text:style-name="T1"> / </text:span><text:span text:style-name="T5">totalClientes</text:span><text:span text:style-name="T1">) * </text:span><text:span text:style-name="T9">100</text:span><text:span text:style-name="T1"> : </text:span><text:span text:style-name="T9">0</text:span><text:span text:style-name="T1">;</text:span></text:p>
      <text:p text:style-name="P5">  <text:span text:style-name="T4">const</text:span><text:span text:style-name="T1"> </text:span><text:span text:style-name="T5">colorAlerta</text:span><text:span text:style-name="T1"> = </text:span><text:span text:style-name="T5">porcentajeNum</text:span><text:span text:style-name="T1"> &gt; </text:span><text:span text:style-name="T9">20</text:span><text:span text:style-name="T1"> ? </text:span><text:span text:style-name="T7">"#e74c3c"</text:span><text:span text:style-name="T1"> : </text:span><text:span text:style-name="T7">"#2ecc71"</text:span><text:span text:style-name="T1">;</text:span></text:p>
      <text:p text:style-name="P6"/>
      <text:p text:style-name="P5">  <text:span text:style-name="T4">return</text:span><text:span text:style-name="T1"> {</text:span></text:p>
      <text:p text:style-name="P5">    <text:span text:style-name="T5">total</text:span><text:span text:style-name="T1">: </text:span><text:span text:style-name="T5">totalClientes</text:span><text:span text:style-name="T1">,</text:span></text:p>
      <text:p text:style-name="P5">    <text:span text:style-name="T5">bajas</text:span><text:span text:style-name="T1">: </text:span><text:span text:style-name="T5">totalBajas</text:span><text:span text:style-name="T1">,</text:span></text:p>
      <text:p text:style-name="P5">    <text:span text:style-name="T5">porcentaje</text:span><text:span text:style-name="T1">: </text:span><text:span text:style-name="T5">porcentajeNum</text:span><text:span text:style-name="T1">.</text:span><text:span text:style-name="T5">toFixed</text:span><text:span text:style-name="T1">(</text:span><text:span text:style-name="T9">2</text:span><text:span text:style-name="T1">) + </text:span><text:span text:style-name="T7">"%"</text:span><text:span text:style-name="T1">,</text:span></text:p>
      <text:p text:style-name="P5">    <text:span text:style-name="T5">color</text:span><text:span text:style-name="T1">: </text:span><text:span text:style-name="T5">colorAlerta</text:span><text:span text:style-name="T1">,</text:span></text:p>
      <text:p text:style-name="P5">    <text:span text:style-name="T5">mediaEdadBajas</text:span><text:span text:style-name="T1">: </text:span><text:span text:style-name="T5">mediaEdad</text:span><text:span text:style-name="T1">,</text:span></text:p>
      <text:p text:style-name="P5">    <text:span text:style-name="T5">contratoMensual</text:span><text:span text:style-name="T1">: </text:span><text:span text:style-name="T5">mensual</text:span><text:span text:style-name="T1">,</text:span></text:p>
      <text:p text:style-name="P5">    <text:span text:style-name="T5">contratoAnual</text:span><text:span text:style-name="T1">: </text:span><text:span text:style-name="T5">anual</text:span></text:p>
      <text:p text:style-name="P5">  <text:span text:style-name="T1">};</text:span></text:p>
      <text:p text:style-name="P4">}</text:p>
      <text:p text:style-name="P10"/>
      <text:p text:style-name="P10"/>
      <text:p text:style-name="P10">Auxiliares.gs</text:p>
      <text:p text:style-name="P10"/>
      <text:p text:style-name="P12"><text:span text:style-name="T2">function</text:span> <text:span text:style-name="T3">obtenerOCrearHoja</text:span>(<text:span text:style-name="T3">nombreHoja</text:span>) {</text:p>
      <text:p text:style-name="P5">  <text:span text:style-name="T4">const</text:span><text:span text:style-name="T1"> </text:span><text:span text:style-name="T5">libro</text:span><text:span text:style-name="T1"> = </text:span><text:span text:style-name="T6">SpreadsheetApp</text:span><text:span text:style-name="T1">.</text:span><text:span text:style-name="T5">getActiveSpreadsheet</text:span><text:span text:style-name="T1">();</text:span></text:p>
      <text:p text:style-name="P5">  <text:span text:style-name="T4">let</text:span><text:span text:style-name="T1"> </text:span><text:span text:style-name="T5">hoja</text:span><text:span text:style-name="T1"> = </text:span><text:span text:style-name="T5">libro</text:span><text:span text:style-name="T1">.</text:span><text:span text:style-name="T5">getSheetByName</text:span><text:span text:style-name="T1">(</text:span><text:span text:style-name="T5">nombreHoja</text:span><text:span text:style-name="T1">);</text:span></text:p>
      <text:p text:style-name="P5">  </text:p>
      <text:p text:style-name="P5">  <text:span text:style-name="T8">// Si la hoja no existe, la creamos</text:span></text:p>
      <text:p text:style-name="P5">  <text:span text:style-name="T4">if</text:span><text:span text:style-name="T1"> (!</text:span><text:span text:style-name="T5">hoja</text:span><text:span text:style-name="T1">) {</text:span></text:p>
      <text:p text:style-name="P5">    <text:span text:style-name="T5">hoja</text:span><text:span text:style-name="T1"> = </text:span><text:span text:style-name="T5">libro</text:span><text:span text:style-name="T1">.</text:span><text:span text:style-name="T5">insertSheet</text:span><text:span text:style-name="T1">(</text:span><text:span text:style-name="T5">nombreHoja</text:span><text:span text:style-name="T1">);</text:span></text:p>
      <text:p text:style-name="P5">    <text:span text:style-name="T6">Logger</text:span><text:span text:style-name="T1">.</text:span><text:span text:style-name="T5">log</text:span><text:span text:style-name="T1">(</text:span><text:span text:style-name="T7">"Hoja '"</text:span><text:span text:style-name="T1"> + </text:span><text:span text:style-name="T5">nombreHoja</text:span><text:span text:style-name="T1"> + </text:span><text:span text:style-name="T7">"' creada desde cero."</text:span><text:span text:style-name="T1">);</text:span></text:p>
      <text:p text:style-name="P5">  <text:span text:style-name="T1">} </text:span><text:span text:style-name="T4">else</text:span><text:span text:style-name="T1"> {</text:span></text:p>
      <text:p text:style-name="P5">    <text:span text:style-name="T8">// Si ya existe, la limpiamos por completo para evitar duplicados</text:span></text:p>
      <text:p text:style-name="P5">    <text:span text:style-name="T5">hoja</text:span><text:span text:style-name="T1">.</text:span><text:span text:style-name="T5">clear</text:span><text:span text:style-name="T1">();</text:span></text:p>
      <text:p text:style-name="P5">    <text:span text:style-name="T6">Logger</text:span><text:span text:style-name="T1">.</text:span><text:span text:style-name="T5">log</text:span><text:span text:style-name="T1">(</text:span><text:span text:style-name="T7">"Hoja '"</text:span><text:span text:style-name="T1"> + </text:span><text:span text:style-name="T5">nombreHoja</text:span><text:span text:style-name="T1"> + </text:span><text:span text:style-name="T7">"' encontrada y limpiada."</text:span><text:span text:style-name="T1">);</text:span></text:p>
      <text:p text:style-name="P5">  <text:span text:style-name="T1">}</text:span></text:p>
      <text:p text:style-name="P5">  </text:p>
      <text:p text:style-name="P5">  <text:span text:style-name="T4">return</text:span><text:span text:style-name="T1"> </text:span><text:span text:style-name="T5">hoja</text:span><text:span text:style-name="T1">;</text:span></text:p>
      <text:p text:style-name="P4">}</text:p>
      <text:p text:style-name="P13"/>
      <text:p text:style-name="P10"/>
      <text:p text:style-name="P10">VistaResumen.html</text:p>
      <text:p text:style-name="P10"/>
      <text:p text:style-name="P12"><text:span text:style-name="T10">&lt;!DOCTYPE</text:span><text:span text:style-name="T11"> html</text:span><text:span text:style-name="T10">&gt;</text:span></text:p>
      <text:p text:style-name="P4"><text:span text:style-name="T12">&lt;</text:span><text:span text:style-name="T2">html</text:span><text:span text:style-name="T12">&gt;</text:span></text:p>
      <text:p text:style-name="P5">  <text:span text:style-name="T13">&lt;</text:span><text:span text:style-name="T4">head</text:span><text:span text:style-name="T13">&gt;</text:span></text:p>
      <text:p text:style-name="P5">    <text:span text:style-name="T13">&lt;</text:span><text:span text:style-name="T4">base</text:span><text:span text:style-name="T1"> </text:span><text:span text:style-name="T9">target</text:span><text:span text:style-name="T13">=</text:span><text:span text:style-name="T7">"_top"</text:span><text:span text:style-name="T13">&gt;</text:span></text:p>
      <text:p text:style-name="P5">    <text:span text:style-name="T13">&lt;</text:span><text:span text:style-name="T4">style</text:span><text:span text:style-name="T13">&gt;</text:span></text:p>
      <text:p text:style-name="P5">      <text:span text:style-name="T14">body</text:span><text:span text:style-name="T1"> { </text:span></text:p>
      <text:p text:style-name="P5">        <text:span text:style-name="T9">font-family:</text:span><text:span text:style-name="T1"> </text:span><text:span text:style-name="T7">'Segoe UI'</text:span><text:span text:style-name="T1">, </text:span><text:span text:style-name="T7">Arial</text:span><text:span text:style-name="T1">, </text:span><text:span text:style-name="T7">sans-serif</text:span><text:span text:style-name="T1">; </text:span></text:p>
      <text:p text:style-name="P5">        <text:span text:style-name="T9">text-align:</text:span><text:span text:style-name="T1"> </text:span><text:span text:style-name="T7">center</text:span><text:span text:style-name="T1">; </text:span></text:p>
      <text:p text:style-name="P5">        <text:span text:style-name="T9">color:</text:span><text:span text:style-name="T1"> </text:span><text:span text:style-name="T15">#333</text:span><text:span text:style-name="T1">; </text:span></text:p>
      <text:p text:style-name="P5"><text:soft-page-break/>        <text:span text:style-name="T9">padding:</text:span><text:span text:style-name="T1"> </text:span><text:span text:style-name="T16">20px</text:span><text:span text:style-name="T1">;</text:span></text:p>
      <text:p text:style-name="P5">        <text:span text:style-name="T9">background-color:</text:span><text:span text:style-name="T1"> </text:span><text:span text:style-name="T15">#f9f9f9</text:span><text:span text:style-name="T1">;</text:span></text:p>
      <text:p text:style-name="P5">      <text:span text:style-name="T1">}</text:span></text:p>
      <text:p text:style-name="P5">      <text:span text:style-name="T14">.card</text:span><text:span text:style-name="T1"> {</text:span></text:p>
      <text:p text:style-name="P5">        <text:span text:style-name="T9">background:</text:span><text:span text:style-name="T1"> </text:span><text:span text:style-name="T7">white</text:span><text:span text:style-name="T1">;</text:span></text:p>
      <text:p text:style-name="P5">        <text:span text:style-name="T9">border-radius:</text:span><text:span text:style-name="T1"> </text:span><text:span text:style-name="T16">12px</text:span><text:span text:style-name="T1">;</text:span></text:p>
      <text:p text:style-name="P5">        <text:span text:style-name="T9">padding:</text:span><text:span text:style-name="T1"> </text:span><text:span text:style-name="T16">25px</text:span><text:span text:style-name="T1">;</text:span></text:p>
      <text:p text:style-name="P5">        <text:span text:style-name="T9">box-shadow:</text:span><text:span text:style-name="T1"> </text:span><text:span text:style-name="T16">0</text:span><text:span text:style-name="T1"> </text:span><text:span text:style-name="T16">4px</text:span><text:span text:style-name="T1"> </text:span><text:span text:style-name="T16">15px</text:span><text:span text:style-name="T1"> </text:span><text:span text:style-name="T7">rgba(</text:span><text:span text:style-name="T16">0</text:span><text:span text:style-name="T1">,</text:span><text:span text:style-name="T16">0</text:span><text:span text:style-name="T1">,</text:span><text:span text:style-name="T16">0</text:span><text:span text:style-name="T1">,</text:span><text:span text:style-name="T16">0.1</text:span><text:span text:style-name="T7">)</text:span><text:span text:style-name="T1">;</text:span></text:p>
      <text:p text:style-name="P5">        <text:span text:style-name="T9">border-top:</text:span><text:span text:style-name="T1"> </text:span><text:span text:style-name="T16">6px</text:span><text:span text:style-name="T1"> </text:span><text:span text:style-name="T7">solid</text:span><text:span text:style-name="T1"> </text:span><text:span text:style-name="T15">#4CAF50</text:span><text:span text:style-name="T1">;</text:span></text:p>
      <text:p text:style-name="P5">      <text:span text:style-name="T1">}</text:span></text:p>
      <text:p text:style-name="P5">      <text:span text:style-name="T14">h2</text:span><text:span text:style-name="T1"> { </text:span><text:span text:style-name="T9">color:</text:span><text:span text:style-name="T1"> </text:span><text:span text:style-name="T15">#2e7d32</text:span><text:span text:style-name="T1">; </text:span><text:span text:style-name="T9">margin-top:</text:span><text:span text:style-name="T1"> </text:span><text:span text:style-name="T16">0</text:span><text:span text:style-name="T1">; }</text:span></text:p>
      <text:p text:style-name="P5">      <text:span text:style-name="T14">.numero</text:span><text:span text:style-name="T1"> { </text:span></text:p>
      <text:p text:style-name="P5">        <text:span text:style-name="T9">font-size:</text:span><text:span text:style-name="T1"> </text:span><text:span text:style-name="T16">42px</text:span><text:span text:style-name="T1">; </text:span></text:p>
      <text:p text:style-name="P5">        <text:span text:style-name="T9">font-weight:</text:span><text:span text:style-name="T1"> </text:span><text:span text:style-name="T7">bold</text:span><text:span text:style-name="T1">; </text:span></text:p>
      <text:p text:style-name="P5">        <text:span text:style-name="T9">color:</text:span><text:span text:style-name="T1"> </text:span><text:span text:style-name="T15">#1b5e20</text:span><text:span text:style-name="T1">; </text:span></text:p>
      <text:p text:style-name="P5">        <text:span text:style-name="T9">margin:</text:span><text:span text:style-name="T1"> </text:span><text:span text:style-name="T16">15px</text:span><text:span text:style-name="T1"> </text:span><text:span text:style-name="T16">0</text:span><text:span text:style-name="T1">;</text:span></text:p>
      <text:p text:style-name="P5">      <text:span text:style-name="T1">}</text:span></text:p>
      <text:p text:style-name="P5">      <text:span text:style-name="T14">.mensaje</text:span><text:span text:style-name="T1"> { </text:span><text:span text:style-name="T9">font-size:</text:span><text:span text:style-name="T1"> </text:span><text:span text:style-name="T16">16px</text:span><text:span text:style-name="T1">; </text:span><text:span text:style-name="T9">margin-bottom:</text:span><text:span text:style-name="T1"> </text:span><text:span text:style-name="T16">20px</text:span><text:span text:style-name="T1">; }</text:span></text:p>
      <text:p text:style-name="P5">      <text:span text:style-name="T14">button</text:span><text:span text:style-name="T1"> { </text:span></text:p>
      <text:p text:style-name="P5">        <text:span text:style-name="T9">background-color:</text:span><text:span text:style-name="T1"> </text:span><text:span text:style-name="T15">#4CAF50</text:span><text:span text:style-name="T1">; </text:span></text:p>
      <text:p text:style-name="P5">        <text:span text:style-name="T9">color:</text:span><text:span text:style-name="T1"> </text:span><text:span text:style-name="T7">white</text:span><text:span text:style-name="T1">; </text:span></text:p>
      <text:p text:style-name="P5">        <text:span text:style-name="T9">padding:</text:span><text:span text:style-name="T1"> </text:span><text:span text:style-name="T16">12px</text:span><text:span text:style-name="T1"> </text:span><text:span text:style-name="T16">25px</text:span><text:span text:style-name="T1">; </text:span></text:p>
      <text:p text:style-name="P5">        <text:span text:style-name="T9">border:</text:span><text:span text:style-name="T1"> </text:span><text:span text:style-name="T7">none</text:span><text:span text:style-name="T1">; </text:span></text:p>
      <text:p text:style-name="P5">        <text:span text:style-name="T9">border-radius:</text:span><text:span text:style-name="T1"> </text:span><text:span text:style-name="T16">6px</text:span><text:span text:style-name="T1">; </text:span></text:p>
      <text:p text:style-name="P5">        <text:span text:style-name="T9">cursor:</text:span><text:span text:style-name="T1"> </text:span><text:span text:style-name="T7">pointer</text:span><text:span text:style-name="T1">; </text:span></text:p>
      <text:p text:style-name="P5">        <text:span text:style-name="T9">font-size:</text:span><text:span text:style-name="T1"> </text:span><text:span text:style-name="T16">14px</text:span><text:span text:style-name="T1">;</text:span></text:p>
      <text:p text:style-name="P5">        <text:span text:style-name="T9">transition:</text:span><text:span text:style-name="T1"> </text:span><text:span text:style-name="T16">0.3s</text:span><text:span text:style-name="T1">;</text:span></text:p>
      <text:p text:style-name="P5">      <text:span text:style-name="T1">}</text:span></text:p>
      <text:p text:style-name="P5">      <text:span text:style-name="T14">button:hover</text:span><text:span text:style-name="T1"> { </text:span><text:span text:style-name="T9">background-color:</text:span><text:span text:style-name="T1"> </text:span><text:span text:style-name="T15">#388E3C</text:span><text:span text:style-name="T1">; }</text:span></text:p>
      <text:p text:style-name="P5">    <text:span text:style-name="T13">&lt;/</text:span><text:span text:style-name="T4">style</text:span><text:span text:style-name="T13">&gt;</text:span></text:p>
      <text:p text:style-name="P5">  <text:span text:style-name="T13">&lt;/</text:span><text:span text:style-name="T4">head</text:span><text:span text:style-name="T13">&gt;</text:span></text:p>
      <text:p text:style-name="P5">  <text:span text:style-name="T13">&lt;</text:span><text:span text:style-name="T4">body</text:span><text:span text:style-name="T13">&gt;</text:span></text:p>
      <text:p text:style-name="P5">    <text:span text:style-name="T13">&lt;</text:span><text:span text:style-name="T4">div</text:span><text:span text:style-name="T1"> </text:span><text:span text:style-name="T9">class</text:span><text:span text:style-name="T13">=</text:span><text:span text:style-name="T7">"card"</text:span><text:span text:style-name="T13">&gt;</text:span></text:p>
      <text:p text:style-name="P5">      <text:span text:style-name="T13">&lt;</text:span><text:span text:style-name="T4">h2</text:span><text:span text:style-name="T13">&gt;</text:span><text:span text:style-name="T1">¡Éxito!</text:span><text:span text:style-name="T13">&lt;/</text:span><text:span text:style-name="T4">h2</text:span><text:span text:style-name="T13">&gt;</text:span></text:p>
      <text:p text:style-name="P5">      <text:span text:style-name="T13">&lt;</text:span><text:span text:style-name="T4">p</text:span><text:span text:style-name="T1"> </text:span><text:span text:style-name="T9">class</text:span><text:span text:style-name="T13">=</text:span><text:span text:style-name="T7">"mensaje"</text:span><text:span text:style-name="T13">&gt;</text:span><text:span text:style-name="T1">Se han analizado y filtrado:</text:span><text:span text:style-name="T13">&lt;/</text:span><text:span text:style-name="T4">p</text:span><text:span text:style-name="T13">&gt;</text:span></text:p>
      <text:p text:style-name="P5">      <text:span text:style-name="T13">&lt;</text:span><text:span text:style-name="T4">div</text:span><text:span text:style-name="T1"> </text:span><text:span text:style-name="T9">class</text:span><text:span text:style-name="T13">=</text:span><text:span text:style-name="T7">"numero"</text:span><text:span text:style-name="T13">&gt;&lt;</text:span><text:span text:style-name="T1">?= cantidad ?&gt;</text:span><text:span text:style-name="T13">&lt;/</text:span><text:span text:style-name="T4">div</text:span><text:span text:style-name="T13">&gt;</text:span></text:p>
      <text:p text:style-name="P5">      <text:span text:style-name="T13">&lt;</text:span><text:span text:style-name="T4">p</text:span><text:span text:style-name="T1"> </text:span><text:span text:style-name="T9">class</text:span><text:span text:style-name="T13">=</text:span><text:span text:style-name="T7">"mensaje"</text:span><text:span text:style-name="T13">&gt;</text:span><text:span text:style-name="T1">registros de clientes con Churn.</text:span><text:span text:style-name="T13">&lt;/</text:span><text:span text:style-name="T4">p</text:span><text:span text:style-name="T13">&gt;</text:span></text:p>
      <text:p text:style-name="P5">      <text:span text:style-name="T13">&lt;</text:span><text:span text:style-name="T4">button</text:span><text:span text:style-name="T1"> </text:span><text:span text:style-name="T9">onclick</text:span><text:span text:style-name="T13">=</text:span><text:span text:style-name="T7">"google.script.host.close()"</text:span><text:span text:style-name="T13">&gt;</text:span><text:span text:style-name="T1">Cerrar Ventana</text:span><text:span text:style-name="T13">&lt;/</text:span><text:span text:style-name="T4">button</text:span><text:span text:style-name="T13">&gt;</text:span></text:p>
      <text:p text:style-name="P5">    <text:span text:style-name="T13">&lt;/</text:span><text:span text:style-name="T4">div</text:span><text:span text:style-name="T13">&gt;</text:span></text:p>
      <text:p text:style-name="P5">  <text:span text:style-name="T13">&lt;/</text:span><text:span text:style-name="T4">body</text:span><text:span text:style-name="T13">&gt;</text:span></text:p>
      <text:p text:style-name="P4"><text:span text:style-name="T12">&lt;/</text:span><text:span text:style-name="T2">html</text:span><text:span text:style-name="T12">&gt;</text:span></text:p>
      <text:p text:style-name="P13"/>
      <text:p text:style-name="P10"/>
      <text:p text:style-name="P10">Dashboard.html</text:p>
      <text:p text:style-name="P10"/>
      <text:p text:style-name="P10"/>
      <text:p text:style-name="P12"><text:span text:style-name="T10">&lt;!DOCTYPE</text:span><text:span text:style-name="T11"> html</text:span><text:span text:style-name="T10">&gt;</text:span></text:p>
      <text:p text:style-name="P4"><text:span text:style-name="T12">&lt;</text:span><text:span text:style-name="T2">html</text:span><text:span text:style-name="T12">&gt;</text:span></text:p>
      <text:p text:style-name="P5">  <text:span text:style-name="T13">&lt;</text:span><text:span text:style-name="T4">head</text:span><text:span text:style-name="T13">&gt;</text:span></text:p>
      <text:p text:style-name="P5">    <text:span text:style-name="T13">&lt;</text:span><text:span text:style-name="T4">base</text:span><text:span text:style-name="T1"> </text:span><text:span text:style-name="T9">target</text:span><text:span text:style-name="T13">=</text:span><text:span text:style-name="T7">"_top"</text:span><text:span text:style-name="T13">&gt;</text:span></text:p>
      <text:p text:style-name="P5">    <text:span text:style-name="T13">&lt;</text:span><text:span text:style-name="T4">link</text:span><text:span text:style-name="T1"> </text:span><text:span text:style-name="T9">href</text:span><text:span text:style-name="T13">=</text:span><text:span text:style-name="T7">"https://fonts.googleapis.com/css2?family=Montserrat:wght@400;700&amp;display=swap"</text:span><text:span text:style-name="T1"> </text:span><text:span text:style-name="T9">rel</text:span><text:span text:style-name="T13">=</text:span><text:span text:style-name="T7">"stylesheet"</text:span><text:span text:style-name="T13">&gt;</text:span></text:p>
      <text:p text:style-name="P5">    </text:p>
      <text:p text:style-name="P5"><text:soft-page-break/>    <text:span text:style-name="T13">&lt;</text:span><text:span text:style-name="T4">style</text:span><text:span text:style-name="T13">&gt;</text:span></text:p>
      <text:p text:style-name="P5">      <text:span text:style-name="T8">/* ESTILOS GENERALES DEL DASHBOARD (MODO OSCURO) */</text:span></text:p>
      <text:p text:style-name="P5">      <text:span text:style-name="T14">body</text:span><text:span text:style-name="T1"> { </text:span></text:p>
      <text:p text:style-name="P5">        <text:span text:style-name="T9">font-family:</text:span><text:span text:style-name="T1"> </text:span><text:span text:style-name="T7">'Montserrat'</text:span><text:span text:style-name="T1">, </text:span><text:span text:style-name="T7">sans-serif</text:span><text:span text:style-name="T1">; </text:span></text:p>
      <text:p text:style-name="P5">        <text:span text:style-name="T9">background-color:</text:span><text:span text:style-name="T1"> </text:span><text:span text:style-name="T15">#0f172a</text:span><text:span text:style-name="T1">; </text:span></text:p>
      <text:p text:style-name="P5">        <text:span text:style-name="T9">color:</text:span><text:span text:style-name="T1"> </text:span><text:span text:style-name="T15">#f8fafc</text:span><text:span text:style-name="T1">;</text:span></text:p>
      <text:p text:style-name="P5">        <text:span text:style-name="T9">margin:</text:span><text:span text:style-name="T1"> </text:span><text:span text:style-name="T16">0</text:span><text:span text:style-name="T1">; </text:span></text:p>
      <text:p text:style-name="P5">        <text:span text:style-name="T9">padding:</text:span><text:span text:style-name="T1"> </text:span><text:span text:style-name="T16">40px</text:span><text:span text:style-name="T1">; </text:span></text:p>
      <text:p text:style-name="P5">      <text:span text:style-name="T1">}</text:span></text:p>
      <text:p text:style-name="P6"/>
      <text:p text:style-name="P5">      <text:span text:style-name="T14">.container</text:span><text:span text:style-name="T1"> { </text:span></text:p>
      <text:p text:style-name="P5">        <text:span text:style-name="T9">max-width:</text:span><text:span text:style-name="T1"> </text:span><text:span text:style-name="T16">950px</text:span><text:span text:style-name="T1">; </text:span></text:p>
      <text:p text:style-name="P5">        <text:span text:style-name="T9">margin:</text:span><text:span text:style-name="T1"> </text:span><text:span text:style-name="T7">auto</text:span><text:span text:style-name="T1">; </text:span></text:p>
      <text:p text:style-name="P5">        <text:span text:style-name="T9">background:</text:span><text:span text:style-name="T1"> </text:span><text:span text:style-name="T15">#1e293b</text:span><text:span text:style-name="T1">; </text:span></text:p>
      <text:p text:style-name="P5">        <text:span text:style-name="T9">padding:</text:span><text:span text:style-name="T1"> </text:span><text:span text:style-name="T16">40px</text:span><text:span text:style-name="T1">;</text:span></text:p>
      <text:p text:style-name="P5">        <text:span text:style-name="T9">border-radius:</text:span><text:span text:style-name="T1"> </text:span><text:span text:style-name="T16">24px</text:span><text:span text:style-name="T1">;</text:span></text:p>
      <text:p text:style-name="P5">        <text:span text:style-name="T9">box-shadow:</text:span><text:span text:style-name="T1"> </text:span><text:span text:style-name="T16">0</text:span><text:span text:style-name="T1"> </text:span><text:span text:style-name="T16">25px</text:span><text:span text:style-name="T1"> </text:span><text:span text:style-name="T16">50px</text:span><text:span text:style-name="T1"> </text:span><text:span text:style-name="T16">-12px</text:span><text:span text:style-name="T1"> </text:span><text:span text:style-name="T7">rgba(</text:span><text:span text:style-name="T16">0</text:span><text:span text:style-name="T1">,</text:span><text:span text:style-name="T16">0</text:span><text:span text:style-name="T1">,</text:span><text:span text:style-name="T16">0</text:span><text:span text:style-name="T1">,</text:span><text:span text:style-name="T16">0.5</text:span><text:span text:style-name="T7">)</text:span><text:span text:style-name="T1">;</text:span></text:p>
      <text:p text:style-name="P5">      <text:span text:style-name="T1">}</text:span></text:p>
      <text:p text:style-name="P6"/>
      <text:p text:style-name="P5">      <text:span text:style-name="T14">h1</text:span><text:span text:style-name="T1"> { </text:span></text:p>
      <text:p text:style-name="P5">        <text:span text:style-name="T9">font-size:</text:span><text:span text:style-name="T1"> </text:span><text:span text:style-name="T16">28px</text:span><text:span text:style-name="T1">; </text:span></text:p>
      <text:p text:style-name="P5">        <text:span text:style-name="T9">font-weight:</text:span><text:span text:style-name="T1"> </text:span><text:span text:style-name="T16">700</text:span><text:span text:style-name="T1">; </text:span></text:p>
      <text:p text:style-name="P5">        <text:span text:style-name="T9">margin-bottom:</text:span><text:span text:style-name="T1"> </text:span><text:span text:style-name="T16">30px</text:span><text:span text:style-name="T1">; </text:span></text:p>
      <text:p text:style-name="P5">        <text:span text:style-name="T9">color:</text:span><text:span text:style-name="T1"> </text:span><text:span text:style-name="T15">#ffffff</text:span><text:span text:style-name="T1">;</text:span></text:p>
      <text:p text:style-name="P5">        <text:span text:style-name="T9">text-transform:</text:span><text:span text:style-name="T1"> </text:span><text:span text:style-name="T7">uppercase</text:span><text:span text:style-name="T1">;</text:span></text:p>
      <text:p text:style-name="P5">        <text:span text:style-name="T9">letter-spacing:</text:span><text:span text:style-name="T1"> </text:span><text:span text:style-name="T16">2px</text:span><text:span text:style-name="T1">;</text:span></text:p>
      <text:p text:style-name="P5">        <text:span text:style-name="T9">text-align:</text:span><text:span text:style-name="T1"> </text:span><text:span text:style-name="T7">center</text:span><text:span text:style-name="T1">;</text:span></text:p>
      <text:p text:style-name="P5">      <text:span text:style-name="T1">}</text:span></text:p>
      <text:p text:style-name="P6"/>
      <text:p text:style-name="P5">      <text:span text:style-name="T8">/* GRID DE TARJETAS */</text:span></text:p>
      <text:p text:style-name="P5">      <text:span text:style-name="T14">.grid-analisis</text:span><text:span text:style-name="T1"> { </text:span></text:p>
      <text:p text:style-name="P5">        <text:span text:style-name="T9">display:</text:span><text:span text:style-name="T1"> </text:span><text:span text:style-name="T7">flex</text:span><text:span text:style-name="T1">; </text:span></text:p>
      <text:p text:style-name="P5">        <text:span text:style-name="T9">gap:</text:span><text:span text:style-name="T1"> </text:span><text:span text:style-name="T16">20px</text:span><text:span text:style-name="T1">; </text:span></text:p>
      <text:p text:style-name="P5">        <text:span text:style-name="T9">justify-content:</text:span><text:span text:style-name="T1"> </text:span><text:span text:style-name="T7">center</text:span><text:span text:style-name="T1">; </text:span></text:p>
      <text:p text:style-name="P5">        <text:span text:style-name="T9">flex-wrap:</text:span><text:span text:style-name="T1"> </text:span><text:span text:style-name="T7">wrap</text:span><text:span text:style-name="T1">; </text:span></text:p>
      <text:p text:style-name="P5">        <text:span text:style-name="T9">margin-bottom:</text:span><text:span text:style-name="T1"> </text:span><text:span text:style-name="T16">20px</text:span><text:span text:style-name="T1">;</text:span></text:p>
      <text:p text:style-name="P5">      <text:span text:style-name="T1">}</text:span></text:p>
      <text:p text:style-name="P6"/>
      <text:p text:style-name="P5">      <text:span text:style-name="T14">.card</text:span><text:span text:style-name="T1"> { </text:span></text:p>
      <text:p text:style-name="P5">        <text:span text:style-name="T9">background:</text:span><text:span text:style-name="T1"> </text:span><text:span text:style-name="T7">rgba(</text:span><text:span text:style-name="T16">255</text:span><text:span text:style-name="T1">, </text:span><text:span text:style-name="T16">255</text:span><text:span text:style-name="T1">, </text:span><text:span text:style-name="T16">255</text:span><text:span text:style-name="T1">, </text:span><text:span text:style-name="T16">0.05</text:span><text:span text:style-name="T7">)</text:span><text:span text:style-name="T1">; </text:span></text:p>
      <text:p text:style-name="P5">        <text:span text:style-name="T9">padding:</text:span><text:span text:style-name="T1"> </text:span><text:span text:style-name="T16">25px</text:span><text:span text:style-name="T1">; </text:span></text:p>
      <text:p text:style-name="P5">        <text:span text:style-name="T9">border-radius:</text:span><text:span text:style-name="T1"> </text:span><text:span text:style-name="T16">16px</text:span><text:span text:style-name="T1">; </text:span></text:p>
      <text:p text:style-name="P5">        <text:span text:style-name="T9">border:</text:span><text:span text:style-name="T1"> </text:span><text:span text:style-name="T16">1px</text:span><text:span text:style-name="T1"> </text:span><text:span text:style-name="T7">solid</text:span><text:span text:style-name="T1"> </text:span><text:span text:style-name="T7">rgba(</text:span><text:span text:style-name="T16">255</text:span><text:span text:style-name="T1">, </text:span><text:span text:style-name="T16">255</text:span><text:span text:style-name="T1">, </text:span><text:span text:style-name="T16">255</text:span><text:span text:style-name="T1">, </text:span><text:span text:style-name="T16">0.1</text:span><text:span text:style-name="T7">)</text:span><text:span text:style-name="T1">;</text:span></text:p>
      <text:p text:style-name="P5">        <text:span text:style-name="T9">flex:</text:span><text:span text:style-name="T1"> </text:span><text:span text:style-name="T16">1</text:span><text:span text:style-name="T1">; </text:span></text:p>
      <text:p text:style-name="P5">        <text:span text:style-name="T9">min-width:</text:span><text:span text:style-name="T1"> </text:span><text:span text:style-name="T16">200px</text:span><text:span text:style-name="T1">;</text:span></text:p>
      <text:p text:style-name="P5">        <text:span text:style-name="T9">text-align:</text:span><text:span text:style-name="T1"> </text:span><text:span text:style-name="T7">center</text:span><text:span text:style-name="T1">;</text:span></text:p>
      <text:p text:style-name="P5">        <text:span text:style-name="T9">transition:</text:span><text:span text:style-name="T1"> </text:span><text:span text:style-name="T7">all</text:span><text:span text:style-name="T1"> </text:span><text:span text:style-name="T16">0.3s</text:span><text:span text:style-name="T1"> </text:span><text:span text:style-name="T7">ease</text:span><text:span text:style-name="T1">;</text:span></text:p>
      <text:p text:style-name="P5">      <text:span text:style-name="T1">}</text:span></text:p>
      <text:p text:style-name="P6"/>
      <text:p text:style-name="P5">      <text:span text:style-name="T14">.card:hover</text:span><text:span text:style-name="T1"> {</text:span></text:p>
      <text:p text:style-name="P5">        <text:span text:style-name="T9">background:</text:span><text:span text:style-name="T1"> </text:span><text:span text:style-name="T7">rgba(</text:span><text:span text:style-name="T16">255</text:span><text:span text:style-name="T1">, </text:span><text:span text:style-name="T16">255</text:span><text:span text:style-name="T1">, </text:span><text:span text:style-name="T16">255</text:span><text:span text:style-name="T1">, </text:span><text:span text:style-name="T16">0.1</text:span><text:span text:style-name="T7">)</text:span><text:span text:style-name="T1">;</text:span></text:p>
      <text:p text:style-name="P5">        <text:span text:style-name="T9">transform:</text:span><text:span text:style-name="T1"> </text:span><text:span text:style-name="T7">translateY(</text:span><text:span text:style-name="T16">-8px</text:span><text:span text:style-name="T7">)</text:span><text:span text:style-name="T1">;</text:span></text:p>
      <text:p text:style-name="P5"><text:soft-page-break/>        <text:span text:style-name="T9">border-color:</text:span><text:span text:style-name="T1"> &lt;?= </text:span><text:span text:style-name="T7">colorAlerta</text:span><text:span text:style-name="T1"> ?&gt;;</text:span></text:p>
      <text:p text:style-name="P5">      <text:span text:style-name="T1">}</text:span></text:p>
      <text:p text:style-name="P6"/>
      <text:p text:style-name="P5">      <text:span text:style-name="T14">.label</text:span><text:span text:style-name="T1"> { </text:span></text:p>
      <text:p text:style-name="P5">        <text:span text:style-name="T9">color:</text:span><text:span text:style-name="T1"> </text:span><text:span text:style-name="T15">#94a3b8</text:span><text:span text:style-name="T1">; </text:span></text:p>
      <text:p text:style-name="P5">        <text:span text:style-name="T9">font-size:</text:span><text:span text:style-name="T1"> </text:span><text:span text:style-name="T16">10px</text:span><text:span text:style-name="T1">; </text:span></text:p>
      <text:p text:style-name="P5">        <text:span text:style-name="T9">font-weight:</text:span><text:span text:style-name="T1"> </text:span><text:span text:style-name="T16">700</text:span><text:span text:style-name="T1">; </text:span></text:p>
      <text:p text:style-name="P5">        <text:span text:style-name="T9">text-transform:</text:span><text:span text:style-name="T1"> </text:span><text:span text:style-name="T7">uppercase</text:span><text:span text:style-name="T1">; </text:span></text:p>
      <text:p text:style-name="P5">        <text:span text:style-name="T9">letter-spacing:</text:span><text:span text:style-name="T1"> </text:span><text:span text:style-name="T16">1.5px</text:span><text:span text:style-name="T1">;</text:span></text:p>
      <text:p text:style-name="P5">        <text:span text:style-name="T9">margin-bottom:</text:span><text:span text:style-name="T1"> </text:span><text:span text:style-name="T16">10px</text:span><text:span text:style-name="T1">;</text:span></text:p>
      <text:p text:style-name="P5">        <text:span text:style-name="T9">display:</text:span><text:span text:style-name="T1"> </text:span><text:span text:style-name="T7">block</text:span><text:span text:style-name="T1">;</text:span></text:p>
      <text:p text:style-name="P5">      <text:span text:style-name="T1">}</text:span></text:p>
      <text:p text:style-name="P6"/>
      <text:p text:style-name="P5">      <text:span text:style-name="T14">.valor</text:span><text:span text:style-name="T1"> { </text:span></text:p>
      <text:p text:style-name="P5">        <text:span text:style-name="T9">font-size:</text:span><text:span text:style-name="T1"> </text:span><text:span text:style-name="T16">34px</text:span><text:span text:style-name="T1">; </text:span></text:p>
      <text:p text:style-name="P5">        <text:span text:style-name="T9">font-weight:</text:span><text:span text:style-name="T1"> </text:span><text:span text:style-name="T16">700</text:span><text:span text:style-name="T1">; </text:span></text:p>
      <text:p text:style-name="P5">        <text:span text:style-name="T9">color:</text:span><text:span text:style-name="T1"> </text:span><text:span text:style-name="T15">#ffffff</text:span><text:span text:style-name="T1">;</text:span></text:p>
      <text:p text:style-name="P5">      <text:span text:style-name="T1">}</text:span></text:p>
      <text:p text:style-name="P6"/>
      <text:p text:style-name="P5">      <text:span text:style-name="T8">/* SECCIÓN DE CHURN Y GRÁFICO */</text:span></text:p>
      <text:p text:style-name="P5">      <text:span text:style-name="T14">.churn-box</text:span><text:span text:style-name="T1"> { </text:span></text:p>
      <text:p text:style-name="P5">        <text:span text:style-name="T9">margin-top:</text:span><text:span text:style-name="T1"> </text:span><text:span text:style-name="T16">30px</text:span><text:span text:style-name="T1">; </text:span></text:p>
      <text:p text:style-name="P5">        <text:span text:style-name="T9">padding:</text:span><text:span text:style-name="T1"> </text:span><text:span text:style-name="T16">40px</text:span><text:span text:style-name="T1">; </text:span></text:p>
      <text:p text:style-name="P5">        <text:span text:style-name="T9">background:</text:span><text:span text:style-name="T1"> </text:span><text:span text:style-name="T7">rgba(</text:span><text:span text:style-name="T16">15</text:span><text:span text:style-name="T1">, </text:span><text:span text:style-name="T16">23</text:span><text:span text:style-name="T1">, </text:span><text:span text:style-name="T16">42</text:span><text:span text:style-name="T1">, </text:span><text:span text:style-name="T16">0.4</text:span><text:span text:style-name="T7">)</text:span><text:span text:style-name="T1">;</text:span></text:p>
      <text:p text:style-name="P5">        <text:span text:style-name="T9">border-radius:</text:span><text:span text:style-name="T1"> </text:span><text:span text:style-name="T16">20px</text:span><text:span text:style-name="T1">; </text:span></text:p>
      <text:p text:style-name="P5">        <text:span text:style-name="T9">border:</text:span><text:span text:style-name="T1"> </text:span><text:span text:style-name="T16">1px</text:span><text:span text:style-name="T1"> </text:span><text:span text:style-name="T7">solid</text:span><text:span text:style-name="T1"> </text:span><text:span text:style-name="T7">rgba(</text:span><text:span text:style-name="T16">255</text:span><text:span text:style-name="T1">, </text:span><text:span text:style-name="T16">255</text:span><text:span text:style-name="T1">, </text:span><text:span text:style-name="T16">255</text:span><text:span text:style-name="T1">, </text:span><text:span text:style-name="T16">0.1</text:span><text:span text:style-name="T7">)</text:span><text:span text:style-name="T1">;</text:span></text:p>
      <text:p text:style-name="P5">        <text:span text:style-name="T9">border-top:</text:span><text:span text:style-name="T1"> </text:span><text:span text:style-name="T16">6px</text:span><text:span text:style-name="T1"> </text:span><text:span text:style-name="T7">solid</text:span><text:span text:style-name="T1"> &lt;?= </text:span><text:span text:style-name="T7">colorAlerta</text:span><text:span text:style-name="T1"> ?&gt;;</text:span></text:p>
      <text:p text:style-name="P5">        <text:span text:style-name="T9">display:</text:span><text:span text:style-name="T1"> </text:span><text:span text:style-name="T7">flex</text:span><text:span text:style-name="T1">;</text:span></text:p>
      <text:p text:style-name="P5">        <text:span text:style-name="T9">align-items:</text:span><text:span text:style-name="T1"> </text:span><text:span text:style-name="T7">center</text:span><text:span text:style-name="T1">;</text:span></text:p>
      <text:p text:style-name="P5">        <text:span text:style-name="T9">justify-content:</text:span><text:span text:style-name="T1"> </text:span><text:span text:style-name="T7">space-around</text:span><text:span text:style-name="T1">;</text:span></text:p>
      <text:p text:style-name="P5">        <text:span text:style-name="T9">flex-wrap:</text:span><text:span text:style-name="T1"> </text:span><text:span text:style-name="T7">wrap</text:span><text:span text:style-name="T1">;</text:span></text:p>
      <text:p text:style-name="P5">        <text:span text:style-name="T9">gap:</text:span><text:span text:style-name="T1"> </text:span><text:span text:style-name="T16">20px</text:span><text:span text:style-name="T1">;</text:span></text:p>
      <text:p text:style-name="P5">      <text:span text:style-name="T1">}</text:span></text:p>
      <text:p text:style-name="P6"/>
      <text:p text:style-name="P5">      <text:span text:style-name="T8">/* BOTÓN DE ENVÍO */</text:span></text:p>
      <text:p text:style-name="P5">      <text:span text:style-name="T14">#btnEnviar</text:span><text:span text:style-name="T1"> {</text:span></text:p>
      <text:p text:style-name="P5">        <text:span text:style-name="T9">background:</text:span><text:span text:style-name="T1"> &lt;?= </text:span><text:span text:style-name="T7">colorAlerta</text:span><text:span text:style-name="T1"> ?&gt;; </text:span></text:p>
      <text:p text:style-name="P5">        <text:span text:style-name="T9">color:</text:span><text:span text:style-name="T1"> </text:span><text:span text:style-name="T7">white</text:span><text:span text:style-name="T1">; </text:span></text:p>
      <text:p text:style-name="P5">        <text:span text:style-name="T9">padding:</text:span><text:span text:style-name="T1"> </text:span><text:span text:style-name="T16">18px</text:span><text:span text:style-name="T1"> </text:span><text:span text:style-name="T16">40px</text:span><text:span text:style-name="T1">; </text:span></text:p>
      <text:p text:style-name="P5">        <text:span text:style-name="T9">border:</text:span><text:span text:style-name="T1"> </text:span><text:span text:style-name="T7">none</text:span><text:span text:style-name="T1">; </text:span></text:p>
      <text:p text:style-name="P5">        <text:span text:style-name="T9">border-radius:</text:span><text:span text:style-name="T1"> </text:span><text:span text:style-name="T16">50px</text:span><text:span text:style-name="T1">; </text:span></text:p>
      <text:p text:style-name="P5">        <text:span text:style-name="T9">cursor:</text:span><text:span text:style-name="T1"> </text:span><text:span text:style-name="T7">pointer</text:span><text:span text:style-name="T1">; </text:span></text:p>
      <text:p text:style-name="P5">        <text:span text:style-name="T9">font-weight:</text:span><text:span text:style-name="T1"> </text:span><text:span text:style-name="T16">700</text:span><text:span text:style-name="T1">; </text:span></text:p>
      <text:p text:style-name="P5">        <text:span text:style-name="T9">font-size:</text:span><text:span text:style-name="T1"> </text:span><text:span text:style-name="T16">16px</text:span><text:span text:style-name="T1">; </text:span></text:p>
      <text:p text:style-name="P5">        <text:span text:style-name="T9">text-transform:</text:span><text:span text:style-name="T1"> </text:span><text:span text:style-name="T7">uppercase</text:span><text:span text:style-name="T1">;</text:span></text:p>
      <text:p text:style-name="P5">        <text:span text:style-name="T9">box-shadow:</text:span><text:span text:style-name="T1"> </text:span><text:span text:style-name="T16">0</text:span><text:span text:style-name="T1"> </text:span><text:span text:style-name="T16">10px</text:span><text:span text:style-name="T1"> </text:span><text:span text:style-name="T16">20px</text:span><text:span text:style-name="T1"> </text:span><text:span text:style-name="T7">rgba(</text:span><text:span text:style-name="T16">0</text:span><text:span text:style-name="T1">,</text:span><text:span text:style-name="T16">0</text:span><text:span text:style-name="T1">,</text:span><text:span text:style-name="T16">0</text:span><text:span text:style-name="T1">,</text:span><text:span text:style-name="T16">0.3</text:span><text:span text:style-name="T7">)</text:span><text:span text:style-name="T1">;</text:span></text:p>
      <text:p text:style-name="P5">        <text:span text:style-name="T9">margin-top:</text:span><text:span text:style-name="T1"> </text:span><text:span text:style-name="T16">30px</text:span><text:span text:style-name="T1">;</text:span></text:p>
      <text:p text:style-name="P5">        <text:span text:style-name="T9">transition:</text:span><text:span text:style-name="T1"> </text:span><text:span text:style-name="T16">0.3s</text:span><text:span text:style-name="T1">;</text:span></text:p>
      <text:p text:style-name="P5">      <text:span text:style-name="T1">}</text:span></text:p>
      <text:p text:style-name="P6"/>
      <text:p text:style-name="P5">      <text:span text:style-name="T14">#btnEnviar:hover</text:span><text:span text:style-name="T1"> { </text:span><text:span text:style-name="T9">filter:</text:span><text:span text:style-name="T1"> </text:span><text:span text:style-name="T7">brightness(</text:span><text:span text:style-name="T16">1.2</text:span><text:span text:style-name="T7">)</text:span><text:span text:style-name="T1">; </text:span><text:span text:style-name="T9">transform:</text:span><text:span text:style-name="T1"> </text:span><text:span text:style-name="T7">scale(</text:span><text:span text:style-name="T16">1.05</text:span><text:span text:style-name="T7">)</text:span><text:span text:style-name="T1">; }</text:span></text:p>
      <text:p text:style-name="P6"/>
      <text:p text:style-name="P5"><text:soft-page-break/>      <text:span text:style-name="T8">/* ESTILO ESPECÍFICO PARA EL CUERPO DEL EMAIL (FONDO CLARO) */</text:span></text:p>
      <text:p text:style-name="P5">      <text:span text:style-name="T14">.email-card</text:span><text:span text:style-name="T1"> {</text:span></text:p>
      <text:p text:style-name="P5">        <text:span text:style-name="T9">background:</text:span><text:span text:style-name="T1"> </text:span><text:span text:style-name="T7">white</text:span><text:span text:style-name="T1">;</text:span></text:p>
      <text:p text:style-name="P5">        <text:span text:style-name="T9">color:</text:span><text:span text:style-name="T1"> </text:span><text:span text:style-name="T15">#1e293b</text:span><text:span text:style-name="T1">;</text:span></text:p>
      <text:p text:style-name="P5">        <text:span text:style-name="T9">text-align:</text:span><text:span text:style-name="T1"> </text:span><text:span text:style-name="T7">left</text:span><text:span text:style-name="T1">;</text:span></text:p>
      <text:p text:style-name="P5">        <text:span text:style-name="T9">border-radius:</text:span><text:span text:style-name="T1"> </text:span><text:span text:style-name="T16">15px</text:span><text:span text:style-name="T1">;</text:span></text:p>
      <text:p text:style-name="P5">        <text:span text:style-name="T9">overflow:</text:span><text:span text:style-name="T1"> </text:span><text:span text:style-name="T7">hidden</text:span><text:span text:style-name="T1">;</text:span></text:p>
      <text:p text:style-name="P5">        <text:span text:style-name="T9">max-width:</text:span><text:span text:style-name="T1"> </text:span><text:span text:style-name="T16">600px</text:span><text:span text:style-name="T1">;</text:span></text:p>
      <text:p text:style-name="P5">        <text:span text:style-name="T9">margin:</text:span><text:span text:style-name="T1"> </text:span><text:span text:style-name="T7">auto</text:span><text:span text:style-name="T1">;</text:span></text:p>
      <text:p text:style-name="P5">      <text:span text:style-name="T1">}</text:span></text:p>
      <text:p text:style-name="P5">    <text:span text:style-name="T13">&lt;/</text:span><text:span text:style-name="T4">style</text:span><text:span text:style-name="T13">&gt;</text:span></text:p>
      <text:p text:style-name="P5">  <text:span text:style-name="T13">&lt;/</text:span><text:span text:style-name="T4">head</text:span><text:span text:style-name="T13">&gt;</text:span></text:p>
      <text:p text:style-name="P5">  <text:span text:style-name="T13">&lt;</text:span><text:span text:style-name="T4">body</text:span><text:span text:style-name="T13">&gt;</text:span></text:p>
      <text:p text:style-name="P5">    <text:span text:style-name="T13">&lt;</text:span><text:span text:style-name="T4">div</text:span><text:span text:style-name="T1"> </text:span><text:span text:style-name="T9">class</text:span><text:span text:style-name="T13">=</text:span><text:span text:style-name="T7">"container"</text:span><text:span text:style-name="T13">&gt;</text:span></text:p>
      <text:p text:style-name="P6"/>
      <text:p text:style-name="P5">      <text:span text:style-name="T13">&lt;</text:span><text:span text:style-name="T1">? if (esResumenEmail) { ?&gt;</text:span></text:p>
      <text:p text:style-name="P5">        <text:span text:style-name="T13">&lt;</text:span><text:span text:style-name="T4">div</text:span><text:span text:style-name="T1"> </text:span><text:span text:style-name="T9">class</text:span><text:span text:style-name="T13">=</text:span><text:span text:style-name="T7">"email-card"</text:span><text:span text:style-name="T13">&gt;</text:span></text:p>
      <text:p text:style-name="P5">          <text:span text:style-name="T13">&lt;</text:span><text:span text:style-name="T4">div</text:span><text:span text:style-name="T1"> </text:span><text:span text:style-name="T9">style</text:span><text:span text:style-name="T13">=</text:span><text:span text:style-name="T7">"background-color: &lt;?= colorAlerta ?&gt;; padding: 25px; text-align: center; color: white;"</text:span><text:span text:style-name="T13">&gt;</text:span></text:p>
      <text:p text:style-name="P5">            <text:span text:style-name="T13">&lt;</text:span><text:span text:style-name="T4">h2</text:span><text:span text:style-name="T1"> </text:span><text:span text:style-name="T9">style</text:span><text:span text:style-name="T13">=</text:span><text:span text:style-name="T7">"margin: 0; text-transform: uppercase; letter-spacing: 2px; color: white;"</text:span><text:span text:style-name="T13">&gt;</text:span><text:span text:style-name="T1">Informe Estratégico de Retención</text:span><text:span text:style-name="T13">&lt;/</text:span><text:span text:style-name="T4">h2</text:span><text:span text:style-name="T13">&gt;</text:span></text:p>
      <text:p text:style-name="P5">            <text:span text:style-name="T13">&lt;</text:span><text:span text:style-name="T4">p</text:span><text:span text:style-name="T1"> </text:span><text:span text:style-name="T9">style</text:span><text:span text:style-name="T13">=</text:span><text:span text:style-name="T7">"margin: 5px 0 0 0; opacity: 0.9;"</text:span><text:span text:style-name="T13">&gt;</text:span><text:span text:style-name="T1">InnovaData Cloud Data Lake | Muestra: </text:span><text:span text:style-name="T13">&lt;</text:span><text:span text:style-name="T1">?= totalClientes ?&gt; Clientes</text:span><text:span text:style-name="T13">&lt;/</text:span><text:span text:style-name="T4">p</text:span><text:span text:style-name="T13">&gt;</text:span></text:p>
      <text:p text:style-name="P5">          <text:span text:style-name="T13">&lt;/</text:span><text:span text:style-name="T4">div</text:span><text:span text:style-name="T13">&gt;</text:span></text:p>
      <text:p text:style-name="P6"/>
      <text:p text:style-name="P5">          <text:span text:style-name="T13">&lt;</text:span><text:span text:style-name="T4">div</text:span><text:span text:style-name="T1"> </text:span><text:span text:style-name="T9">style</text:span><text:span text:style-name="T13">=</text:span><text:span text:style-name="T7">"padding: 30px; color: #2c3e50; line-height: 1.6;"</text:span><text:span text:style-name="T13">&gt;</text:span></text:p>
      <text:p text:style-name="P5">            <text:span text:style-name="T13">&lt;</text:span><text:span text:style-name="T4">p</text:span><text:span text:style-name="T13">&gt;</text:span><text:span text:style-name="T1">Estimado Director,</text:span><text:span text:style-name="T13">&lt;/</text:span><text:span text:style-name="T4">p</text:span><text:span text:style-name="T13">&gt;</text:span></text:p>
      <text:p text:style-name="P5">            <text:span text:style-name="T13">&lt;</text:span><text:span text:style-name="T4">p</text:span><text:span text:style-name="T13">&gt;</text:span><text:span text:style-name="T1">Tras concluir el análisis avanzado de los indicadores de retención extraídos directamente de nuestro almacén en la nube, se han obtenido las siguientes conclusiones estratégicas:</text:span><text:span text:style-name="T13">&lt;/</text:span><text:span text:style-name="T4">p</text:span><text:span text:style-name="T13">&gt;</text:span></text:p>
      <text:p text:style-name="P5">            </text:p>
      <text:p text:style-name="P5">            <text:span text:style-name="T13">&lt;</text:span><text:span text:style-name="T4">ul</text:span><text:span text:style-name="T1"> </text:span><text:span text:style-name="T9">style</text:span><text:span text:style-name="T13">=</text:span><text:span text:style-name="T7">"padding-left: 20px;"</text:span><text:span text:style-name="T13">&gt;</text:span></text:p>
      <text:p text:style-name="P5">              <text:span text:style-name="T13">&lt;</text:span><text:span text:style-name="T4">li</text:span><text:span text:style-name="T13">&gt;&lt;</text:span><text:span text:style-name="T4">strong</text:span><text:span text:style-name="T13">&gt;</text:span><text:span text:style-name="T1">Volumen:</text:span><text:span text:style-name="T13">&lt;/</text:span><text:span text:style-name="T4">strong</text:span><text:span text:style-name="T13">&gt;</text:span><text:span text:style-name="T1"> Se identifican </text:span><text:span text:style-name="T13">&lt;</text:span><text:span text:style-name="T4">strong</text:span><text:span text:style-name="T13">&gt;&lt;</text:span><text:span text:style-name="T1">?= totalBajas ?&gt; bajas</text:span><text:span text:style-name="T13">&lt;/</text:span><text:span text:style-name="T4">strong</text:span><text:span text:style-name="T13">&gt;</text:span><text:span text:style-name="T1"> sobre un total de </text:span><text:span text:style-name="T13">&lt;</text:span><text:span text:style-name="T1">?= totalClientes ?&gt; registros cloud.</text:span><text:span text:style-name="T13">&lt;/</text:span><text:span text:style-name="T4">li</text:span><text:span text:style-name="T13">&gt;</text:span></text:p>
      <text:p text:style-name="P5">              <text:span text:style-name="T13">&lt;</text:span><text:span text:style-name="T4">li</text:span><text:span text:style-name="T13">&gt;&lt;</text:span><text:span text:style-name="T4">strong</text:span><text:span text:style-name="T13">&gt;</text:span><text:span text:style-name="T1">Perfil:</text:span><text:span text:style-name="T13">&lt;/</text:span><text:span text:style-name="T4">strong</text:span><text:span text:style-name="T13">&gt;</text:span><text:span text:style-name="T1"> La pérdida de clientes se concentra en el segmento de </text:span><text:span text:style-name="T13">&lt;</text:span><text:span text:style-name="T4">strong</text:span><text:span text:style-name="T13">&gt;&lt;</text:span><text:span text:style-name="T1">?= mediaEdadBajas ?&gt; años</text:span><text:span text:style-name="T13">&lt;/</text:span><text:span text:style-name="T4">strong</text:span><text:span text:style-name="T13">&gt;</text:span><text:span text:style-name="T1">.</text:span><text:span text:style-name="T13">&lt;/</text:span><text:span text:style-name="T4">li</text:span><text:span text:style-name="T13">&gt;</text:span></text:p>
      <text:p text:style-name="P5">              <text:span text:style-name="T13">&lt;</text:span><text:span text:style-name="T4">li</text:span><text:span text:style-name="T13">&gt;&lt;</text:span><text:span text:style-name="T4">strong</text:span><text:span text:style-name="T13">&gt;</text:span><text:span text:style-name="T1">Riesgo:</text:span><text:span text:style-name="T13">&lt;/</text:span><text:span text:style-name="T4">strong</text:span><text:span text:style-name="T13">&gt;</text:span><text:span text:style-name="T1"> Vulnerabilidad alta en contratos mensuales (</text:span><text:span text:style-name="T13">&lt;</text:span><text:span text:style-name="T4">strong</text:span><text:span text:style-name="T13">&gt;&lt;</text:span><text:span text:style-name="T1">?= contratoMensual ?&gt; casos</text:span><text:span text:style-name="T13">&lt;/</text:span><text:span text:style-name="T4">strong</text:span><text:span text:style-name="T13">&gt;</text:span><text:span text:style-name="T1">).</text:span><text:span text:style-name="T13">&lt;/</text:span><text:span text:style-name="T4">li</text:span><text:span text:style-name="T13">&gt;</text:span></text:p>
      <text:p text:style-name="P5">            <text:span text:style-name="T13">&lt;/</text:span><text:span text:style-name="T4">ul</text:span><text:span text:style-name="T13">&gt;</text:span></text:p>
      <text:p text:style-name="P6"/>
      <text:p text:style-name="P5">            <text:span text:style-name="T13">&lt;</text:span><text:span text:style-name="T4">div</text:span><text:span text:style-name="T1"> </text:span><text:span text:style-name="T9">style</text:span><text:span text:style-name="T13">=</text:span><text:span text:style-name="T7">"background: #f8fafc; border-left: 4px solid &lt;?= colorAlerta ?&gt;; padding: 15px; margin: 20px 0;"</text:span><text:span text:style-name="T13">&gt;</text:span></text:p>
      <text:p text:style-name="P5">              <text:span text:style-name="T13">&lt;</text:span><text:span text:style-name="T4">strong</text:span><text:span text:style-name="T13">&gt;</text:span><text:span text:style-name="T1">Conclusión:</text:span><text:span text:style-name="T13">&lt;/</text:span><text:span text:style-name="T4">strong</text:span><text:span text:style-name="T13">&gt;</text:span><text:span text:style-name="T1"> </text:span></text:p>
      <text:p text:style-name="P5">              <text:span text:style-name="T13">&lt;</text:span><text:span text:style-name="T1">?= (parseFloat(porcentajeChurn) &gt; 20) ? </text:span></text:p>
      <text:p text:style-name="P5">                  <text:span text:style-name="T1">"La tasa de churn actual es crítica en el repositorio remoto. Se requiere intervención inmediata sobre el programa de fidelización." : </text:span></text:p>
      <text:p text:style-name="P5">                  <text:span text:style-name="T1">"La situación en la nube se mantiene estable y bajo los parámetros de control establecidos." ?&gt;</text:span></text:p>
      <text:p text:style-name="P5">            <text:span text:style-name="T13">&lt;/</text:span><text:span text:style-name="T4">div</text:span><text:span text:style-name="T13">&gt;</text:span></text:p>
      <text:p text:style-name="P6"/>
      <text:p text:style-name="P5">            <text:span text:style-name="T13">&lt;</text:span><text:span text:style-name="T4">p</text:span><text:span text:style-name="T13">&gt;</text:span><text:span text:style-name="T1">Quedo a su disposición para cualquier aclaración.</text:span><text:span text:style-name="T13">&lt;/</text:span><text:span text:style-name="T4">p</text:span><text:span text:style-name="T13">&gt;</text:span></text:p>
      <text:p text:style-name="P5">            </text:p>
      <text:p text:style-name="P5">            <text:span text:style-name="T13">&lt;</text:span><text:span text:style-name="T4">div</text:span><text:span text:style-name="T1"> </text:span><text:span text:style-name="T9">style</text:span><text:span text:style-name="T13">=</text:span><text:span text:style-name="T7">"margin-top: 30px; border-top: 1px solid #f1f5f9; padding-top: 20px;"</text:span><text:span text:style-name="T13">&gt;</text:span></text:p>
      <text:p text:style-name="P5"><text:soft-page-break/>              <text:span text:style-name="T13">&lt;</text:span><text:span text:style-name="T4">strong</text:span><text:span text:style-name="T13">&gt;</text:span><text:span text:style-name="T1">Betsabé Cardoso</text:span><text:span text:style-name="T13">&lt;/</text:span><text:span text:style-name="T4">strong</text:span><text:span text:style-name="T13">&gt;&lt;</text:span><text:span text:style-name="T4">br</text:span><text:span text:style-name="T13">&gt;</text:span></text:p>
      <text:p text:style-name="P5">              <text:span text:style-name="T13">&lt;</text:span><text:span text:style-name="T4">span</text:span><text:span text:style-name="T1"> </text:span><text:span text:style-name="T9">style</text:span><text:span text:style-name="T13">=</text:span><text:span text:style-name="T7">"color: #64748b; font-size: 13px;"</text:span><text:span text:style-name="T13">&gt;</text:span><text:span text:style-name="T1">Analista de Datos Especialista en BI</text:span><text:span text:style-name="T13">&lt;/</text:span><text:span text:style-name="T4">span</text:span><text:span text:style-name="T13">&gt;</text:span></text:p>
      <text:p text:style-name="P5">            <text:span text:style-name="T13">&lt;/</text:span><text:span text:style-name="T4">div</text:span><text:span text:style-name="T13">&gt;</text:span></text:p>
      <text:p text:style-name="P6"/>
      <text:p text:style-name="P5">            <text:span text:style-name="T13">&lt;</text:span><text:span text:style-name="T4">div</text:span><text:span text:style-name="T1"> </text:span><text:span text:style-name="T9">style</text:span><text:span text:style-name="T13">=</text:span><text:span text:style-name="T7">"text-align: center; margin-top: 30px;"</text:span><text:span text:style-name="T13">&gt;</text:span></text:p>
      <text:p text:style-name="P5">              <text:span text:style-name="T13">&lt;</text:span><text:span text:style-name="T4">a</text:span><text:span text:style-name="T1"> </text:span><text:span text:style-name="T9">href</text:span><text:span text:style-name="T13">=</text:span><text:span text:style-name="T7">"&lt;?= urlAppWeb ?&gt;"</text:span><text:span text:style-name="T1"> </text:span><text:span text:style-name="T9">style</text:span><text:span text:style-name="T13">=</text:span><text:span text:style-name="T7">"background: #0f172a; color: white; padding: 14px 28px; text-decoration: none; border-radius: 8px; font-weight: 600; display: inline-block;"</text:span><text:span text:style-name="T13">&gt;</text:span></text:p>
      <text:p text:style-name="P5">                <text:span text:style-name="T1">Acceder al Dashboard Interactivo</text:span></text:p>
      <text:p text:style-name="P5">              <text:span text:style-name="T13">&lt;/</text:span><text:span text:style-name="T4">a</text:span><text:span text:style-name="T13">&gt;</text:span></text:p>
      <text:p text:style-name="P5">            <text:span text:style-name="T13">&lt;/</text:span><text:span text:style-name="T4">div</text:span><text:span text:style-name="T13">&gt;</text:span></text:p>
      <text:p text:style-name="P5">          <text:span text:style-name="T13">&lt;/</text:span><text:span text:style-name="T4">div</text:span><text:span text:style-name="T13">&gt;</text:span></text:p>
      <text:p text:style-name="P5">        <text:span text:style-name="T13">&lt;/</text:span><text:span text:style-name="T4">div</text:span><text:span text:style-name="T13">&gt;</text:span></text:p>
      <text:p text:style-name="P6"/>
      <text:p text:style-name="P5">      <text:span text:style-name="T13">&lt;</text:span><text:span text:style-name="T1">? } else { ?&gt;</text:span></text:p>
      <text:p text:style-name="P5">        <text:span text:style-name="T13">&lt;</text:span><text:span text:style-name="T4">h1</text:span><text:span text:style-name="T13">&gt;</text:span><text:span text:style-name="T1">Panel de Inteligencia de Negocio (Cloud Lake)</text:span><text:span text:style-name="T13">&lt;/</text:span><text:span text:style-name="T4">h1</text:span><text:span text:style-name="T13">&gt;</text:span></text:p>
      <text:p text:style-name="P5">        </text:p>
      <text:p text:style-name="P5">        <text:span text:style-name="T13">&lt;</text:span><text:span text:style-name="T4">div</text:span><text:span text:style-name="T1"> </text:span><text:span text:style-name="T9">class</text:span><text:span text:style-name="T13">=</text:span><text:span text:style-name="T7">"grid-analisis"</text:span><text:span text:style-name="T13">&gt;</text:span></text:p>
      <text:p text:style-name="P5">          <text:span text:style-name="T13">&lt;</text:span><text:span text:style-name="T4">div</text:span><text:span text:style-name="T1"> </text:span><text:span text:style-name="T9">class</text:span><text:span text:style-name="T13">=</text:span><text:span text:style-name="T7">"card"</text:span><text:span text:style-name="T13">&gt;</text:span></text:p>
      <text:p text:style-name="P5">            <text:span text:style-name="T13">&lt;</text:span><text:span text:style-name="T4">span</text:span><text:span text:style-name="T1"> </text:span><text:span text:style-name="T9">class</text:span><text:span text:style-name="T13">=</text:span><text:span text:style-name="T7">"label"</text:span><text:span text:style-name="T13">&gt;</text:span><text:span text:style-name="T1">Clientes Totales (Cloud)</text:span><text:span text:style-name="T13">&lt;/</text:span><text:span text:style-name="T4">span</text:span><text:span text:style-name="T13">&gt;</text:span></text:p>
      <text:p text:style-name="P5">            <text:span text:style-name="T13">&lt;</text:span><text:span text:style-name="T4">span</text:span><text:span text:style-name="T1"> </text:span><text:span text:style-name="T9">class</text:span><text:span text:style-name="T13">=</text:span><text:span text:style-name="T7">"valor"</text:span><text:span text:style-name="T13">&gt;&lt;</text:span><text:span text:style-name="T1">?= totalClientes ?&gt;</text:span><text:span text:style-name="T13">&lt;/</text:span><text:span text:style-name="T4">span</text:span><text:span text:style-name="T13">&gt;</text:span></text:p>
      <text:p text:style-name="P5">          <text:span text:style-name="T13">&lt;/</text:span><text:span text:style-name="T4">div</text:span><text:span text:style-name="T13">&gt;</text:span></text:p>
      <text:p text:style-name="P5">          <text:span text:style-name="T13">&lt;</text:span><text:span text:style-name="T4">div</text:span><text:span text:style-name="T1"> </text:span><text:span text:style-name="T9">class</text:span><text:span text:style-name="T13">=</text:span><text:span text:style-name="T7">"card"</text:span><text:span text:style-name="T1"> </text:span><text:span text:style-name="T9">style</text:span><text:span text:style-name="T13">=</text:span><text:span text:style-name="T7">"border-color: &lt;?= colorAlerta ?&gt;;"</text:span><text:span text:style-name="T13">&gt;</text:span></text:p>
      <text:p text:style-name="P5">            <text:span text:style-name="T13">&lt;</text:span><text:span text:style-name="T4">span</text:span><text:span text:style-name="T1"> </text:span><text:span text:style-name="T9">class</text:span><text:span text:style-name="T13">=</text:span><text:span text:style-name="T7">"label"</text:span><text:span text:style-name="T13">&gt;</text:span><text:span text:style-name="T1">Bajas Detectadas</text:span><text:span text:style-name="T13">&lt;/</text:span><text:span text:style-name="T4">span</text:span><text:span text:style-name="T13">&gt;</text:span></text:p>
      <text:p text:style-name="P5">            <text:span text:style-name="T13">&lt;</text:span><text:span text:style-name="T4">span</text:span><text:span text:style-name="T1"> </text:span><text:span text:style-name="T9">class</text:span><text:span text:style-name="T13">=</text:span><text:span text:style-name="T7">"valor"</text:span><text:span text:style-name="T1"> </text:span><text:span text:style-name="T9">style</text:span><text:span text:style-name="T13">=</text:span><text:span text:style-name="T7">"color: &lt;?= colorAlerta ?&gt;;"</text:span><text:span text:style-name="T13">&gt;&lt;</text:span><text:span text:style-name="T1">?= totalBajas ?&gt;</text:span><text:span text:style-name="T13">&lt;/</text:span><text:span text:style-name="T4">span</text:span><text:span text:style-name="T13">&gt;</text:span></text:p>
      <text:p text:style-name="P5">          <text:span text:style-name="T13">&lt;/</text:span><text:span text:style-name="T4">div</text:span><text:span text:style-name="T13">&gt;</text:span></text:p>
      <text:p text:style-name="P5">          <text:span text:style-name="T13">&lt;</text:span><text:span text:style-name="T4">div</text:span><text:span text:style-name="T1"> </text:span><text:span text:style-name="T9">class</text:span><text:span text:style-name="T13">=</text:span><text:span text:style-name="T7">"card"</text:span><text:span text:style-name="T13">&gt;</text:span></text:p>
      <text:p text:style-name="P5">            <text:span text:style-name="T13">&lt;</text:span><text:span text:style-name="T4">span</text:span><text:span text:style-name="T1"> </text:span><text:span text:style-name="T9">class</text:span><text:span text:style-name="T13">=</text:span><text:span text:style-name="T7">"label"</text:span><text:span text:style-name="T13">&gt;</text:span><text:span text:style-name="T1">Edad Media Bajas</text:span><text:span text:style-name="T13">&lt;/</text:span><text:span text:style-name="T4">span</text:span><text:span text:style-name="T13">&gt;</text:span></text:p>
      <text:p text:style-name="P5">            <text:span text:style-name="T13">&lt;</text:span><text:span text:style-name="T4">span</text:span><text:span text:style-name="T1"> </text:span><text:span text:style-name="T9">class</text:span><text:span text:style-name="T13">=</text:span><text:span text:style-name="T7">"valor"</text:span><text:span text:style-name="T13">&gt;&lt;</text:span><text:span text:style-name="T1">?= mediaEdadBajas ?&gt;</text:span><text:span text:style-name="T13">&lt;/</text:span><text:span text:style-name="T4">span</text:span><text:span text:style-name="T13">&gt;</text:span></text:p>
      <text:p text:style-name="P5">          <text:span text:style-name="T13">&lt;/</text:span><text:span text:style-name="T4">div</text:span><text:span text:style-name="T13">&gt;</text:span></text:p>
      <text:p text:style-name="P5">        <text:span text:style-name="T13">&lt;/</text:span><text:span text:style-name="T4">div</text:span><text:span text:style-name="T13">&gt;</text:span></text:p>
      <text:p text:style-name="P6"/>
      <text:p text:style-name="P5">        <text:span text:style-name="T13">&lt;</text:span><text:span text:style-name="T4">div</text:span><text:span text:style-name="T1"> </text:span><text:span text:style-name="T9">class</text:span><text:span text:style-name="T13">=</text:span><text:span text:style-name="T7">"grid-analisis"</text:span><text:span text:style-name="T13">&gt;</text:span></text:p>
      <text:p text:style-name="P5">          <text:span text:style-name="T13">&lt;</text:span><text:span text:style-name="T4">div</text:span><text:span text:style-name="T1"> </text:span><text:span text:style-name="T9">class</text:span><text:span text:style-name="T13">=</text:span><text:span text:style-name="T7">"card"</text:span><text:span text:style-name="T13">&gt;</text:span></text:p>
      <text:p text:style-name="P5">            <text:span text:style-name="T13">&lt;</text:span><text:span text:style-name="T4">span</text:span><text:span text:style-name="T1"> </text:span><text:span text:style-name="T9">class</text:span><text:span text:style-name="T13">=</text:span><text:span text:style-name="T7">"label"</text:span><text:span text:style-name="T13">&gt;</text:span><text:span text:style-name="T1">Contratos Mensuales</text:span><text:span text:style-name="T13">&lt;/</text:span><text:span text:style-name="T4">span</text:span><text:span text:style-name="T13">&gt;</text:span></text:p>
      <text:p text:style-name="P5">            <text:span text:style-name="T13">&lt;</text:span><text:span text:style-name="T4">span</text:span><text:span text:style-name="T1"> </text:span><text:span text:style-name="T9">class</text:span><text:span text:style-name="T13">=</text:span><text:span text:style-name="T7">"valor"</text:span><text:span text:style-name="T1"> </text:span><text:span text:style-name="T9">style</text:span><text:span text:style-name="T13">=</text:span><text:span text:style-name="T7">"color: #38bdf8;"</text:span><text:span text:style-name="T13">&gt;&lt;</text:span><text:span text:style-name="T1">?= contratoMensual ?&gt;</text:span><text:span text:style-name="T13">&lt;/</text:span><text:span text:style-name="T4">span</text:span><text:span text:style-name="T13">&gt;</text:span></text:p>
      <text:p text:style-name="P5">          <text:span text:style-name="T13">&lt;/</text:span><text:span text:style-name="T4">div</text:span><text:span text:style-name="T13">&gt;</text:span></text:p>
      <text:p text:style-name="P5">          <text:span text:style-name="T13">&lt;</text:span><text:span text:style-name="T4">div</text:span><text:span text:style-name="T1"> </text:span><text:span text:style-name="T9">class</text:span><text:span text:style-name="T13">=</text:span><text:span text:style-name="T7">"card"</text:span><text:span text:style-name="T13">&gt;</text:span></text:p>
      <text:p text:style-name="P5">            <text:span text:style-name="T13">&lt;</text:span><text:span text:style-name="T4">span</text:span><text:span text:style-name="T1"> </text:span><text:span text:style-name="T9">class</text:span><text:span text:style-name="T13">=</text:span><text:span text:style-name="T7">"label"</text:span><text:span text:style-name="T13">&gt;</text:span><text:span text:style-name="T1">Contratos Anuales</text:span><text:span text:style-name="T13">&lt;/</text:span><text:span text:style-name="T4">span</text:span><text:span text:style-name="T13">&gt;</text:span></text:p>
      <text:p text:style-name="P5">            <text:span text:style-name="T13">&lt;</text:span><text:span text:style-name="T4">span</text:span><text:span text:style-name="T1"> </text:span><text:span text:style-name="T9">class</text:span><text:span text:style-name="T13">=</text:span><text:span text:style-name="T7">"valor"</text:span><text:span text:style-name="T1"> </text:span><text:span text:style-name="T9">style</text:span><text:span text:style-name="T13">=</text:span><text:span text:style-name="T7">"color: #a855f7;"</text:span><text:span text:style-name="T13">&gt;&lt;</text:span><text:span text:style-name="T1">?= contratoAnual ?&gt;</text:span><text:span text:style-name="T13">&lt;/</text:span><text:span text:style-name="T4">span</text:span><text:span text:style-name="T13">&gt;</text:span></text:p>
      <text:p text:style-name="P5">          <text:span text:style-name="T13">&lt;/</text:span><text:span text:style-name="T4">div</text:span><text:span text:style-name="T13">&gt;</text:span></text:p>
      <text:p text:style-name="P5">        <text:span text:style-name="T13">&lt;/</text:span><text:span text:style-name="T4">div</text:span><text:span text:style-name="T13">&gt;</text:span></text:p>
      <text:p text:style-name="P6"/>
      <text:p text:style-name="P5">        <text:span text:style-name="T13">&lt;</text:span><text:span text:style-name="T4">div</text:span><text:span text:style-name="T1"> </text:span><text:span text:style-name="T9">class</text:span><text:span text:style-name="T13">=</text:span><text:span text:style-name="T7">"churn-box"</text:span><text:span text:style-name="T13">&gt;</text:span></text:p>
      <text:p text:style-name="P5">          <text:span text:style-name="T13">&lt;</text:span><text:span text:style-name="T4">div</text:span><text:span text:style-name="T1"> </text:span><text:span text:style-name="T9">style</text:span><text:span text:style-name="T13">=</text:span><text:span text:style-name="T7">"text-align: center;"</text:span><text:span text:style-name="T13">&gt;</text:span></text:p>
      <text:p text:style-name="P5">            <text:span text:style-name="T13">&lt;</text:span><text:span text:style-name="T4">span</text:span><text:span text:style-name="T1"> </text:span><text:span text:style-name="T9">class</text:span><text:span text:style-name="T13">=</text:span><text:span text:style-name="T7">"label"</text:span><text:span text:style-name="T13">&gt;</text:span><text:span text:style-name="T1">Tasa de Abandono</text:span><text:span text:style-name="T13">&lt;/</text:span><text:span text:style-name="T4">span</text:span><text:span text:style-name="T13">&gt;</text:span></text:p>
      <text:p text:style-name="P5">            <text:span text:style-name="T13">&lt;</text:span><text:span text:style-name="T4">div</text:span><text:span text:style-name="T1"> </text:span><text:span text:style-name="T9">class</text:span><text:span text:style-name="T13">=</text:span><text:span text:style-name="T7">"valor"</text:span><text:span text:style-name="T1"> </text:span><text:span text:style-name="T9">style</text:span><text:span text:style-name="T13">=</text:span><text:span text:style-name="T7">"color: &lt;?= colorAlerta ?&gt;; font-size: 70px; margin: 10px 0;"</text:span><text:span text:style-name="T13">&gt;</text:span></text:p>
      <text:p text:style-name="P5">              <text:span text:style-name="T13">&lt;</text:span><text:span text:style-name="T1">?= porcentajeChurn ?&gt;</text:span></text:p>
      <text:p text:style-name="P5">            <text:span text:style-name="T13">&lt;/</text:span><text:span text:style-name="T4">div</text:span><text:span text:style-name="T13">&gt;</text:span></text:p>
      <text:p text:style-name="P5">            <text:span text:style-name="T13">&lt;</text:span><text:span text:style-name="T4">p</text:span><text:span text:style-name="T1"> </text:span><text:span text:style-name="T9">style</text:span><text:span text:style-name="T13">=</text:span><text:span text:style-name="T7">"font-size: 16px; font-weight: 700; color: &lt;?= colorAlerta ?&gt;;"</text:span><text:span text:style-name="T13">&gt;</text:span></text:p>
      <text:p text:style-name="P5"><text:soft-page-break/>              <text:span text:style-name="T1">ESTADO: </text:span><text:span text:style-name="T13">&lt;</text:span><text:span text:style-name="T1">?= (parseFloat(porcentajeChurn) &gt; 20) ? "CRÍTICO" : "ESTABLE" ?&gt;</text:span></text:p>
      <text:p text:style-name="P5">            <text:span text:style-name="T13">&lt;/</text:span><text:span text:style-name="T4">p</text:span><text:span text:style-name="T13">&gt;</text:span></text:p>
      <text:p text:style-name="P5">          <text:span text:style-name="T13">&lt;/</text:span><text:span text:style-name="T4">div</text:span><text:span text:style-name="T13">&gt;</text:span></text:p>
      <text:p text:style-name="P6"/>
      <text:p text:style-name="P5">          <text:span text:style-name="T13">&lt;</text:span><text:span text:style-name="T4">div</text:span><text:span text:style-name="T1"> </text:span><text:span text:style-name="T9">id</text:span><text:span text:style-name="T13">=</text:span><text:span text:style-name="T7">"grafico_donut"</text:span><text:span text:style-name="T1"> </text:span><text:span text:style-name="T9">style</text:span><text:span text:style-name="T13">=</text:span><text:span text:style-name="T7">"width: 350px; height: 250px;"</text:span><text:span text:style-name="T13">&gt;&lt;/</text:span><text:span text:style-name="T4">div</text:span><text:span text:style-name="T13">&gt;</text:span></text:p>
      <text:p text:style-name="P5">        <text:span text:style-name="T13">&lt;/</text:span><text:span text:style-name="T4">div</text:span><text:span text:style-name="T13">&gt;</text:span></text:p>
      <text:p text:style-name="P6"/>
      <text:p text:style-name="P5">        <text:span text:style-name="T13">&lt;</text:span><text:span text:style-name="T1">? if (esVistaPrevia) { ?&gt;</text:span></text:p>
      <text:p text:style-name="P5">          <text:span text:style-name="T13">&lt;</text:span><text:span text:style-name="T4">div</text:span><text:span text:style-name="T1"> </text:span><text:span text:style-name="T9">style</text:span><text:span text:style-name="T13">=</text:span><text:span text:style-name="T7">"text-align: center;"</text:span><text:span text:style-name="T13">&gt;</text:span></text:p>
      <text:p text:style-name="P5">            <text:span text:style-name="T13">&lt;</text:span><text:span text:style-name="T4">button</text:span><text:span text:style-name="T1"> </text:span><text:span text:style-name="T9">onclick</text:span><text:span text:style-name="T13">=</text:span><text:span text:style-name="T7">"enviarConCarga()"</text:span><text:span text:style-name="T1"> </text:span><text:span text:style-name="T9">id</text:span><text:span text:style-name="T13">=</text:span><text:span text:style-name="T7">"btnEnviar"</text:span><text:span text:style-name="T13">&gt;</text:span><text:span text:style-name="T1">Confirmar y Enviar al Director</text:span><text:span text:style-name="T13">&lt;/</text:span><text:span text:style-name="T4">button</text:span><text:span text:style-name="T13">&gt;</text:span></text:p>
      <text:p text:style-name="P5">            <text:span text:style-name="T13">&lt;</text:span><text:span text:style-name="T4">p</text:span><text:span text:style-name="T1"> </text:span><text:span text:style-name="T9">id</text:span><text:span text:style-name="T13">=</text:span><text:span text:style-name="T7">"msgCarga"</text:span><text:span text:style-name="T1"> </text:span><text:span text:style-name="T9">style</text:span><text:span text:style-name="T13">=</text:span><text:span text:style-name="T7">"display:none; color: #94a3b8; margin-top: 20px;"</text:span><text:span text:style-name="T13">&gt;</text:span><text:span text:style-name="T1">🚀 Conectando con servidor de correo y preparando reporte...</text:span><text:span text:style-name="T13">&lt;/</text:span><text:span text:style-name="T4">p</text:span><text:span text:style-name="T13">&gt;</text:span></text:p>
      <text:p text:style-name="P5">          <text:span text:style-name="T13">&lt;/</text:span><text:span text:style-name="T4">div</text:span><text:span text:style-name="T13">&gt;</text:span></text:p>
      <text:p text:style-name="P5">        <text:span text:style-name="T13">&lt;</text:span><text:span text:style-name="T1">? } ?&gt;</text:span></text:p>
      <text:p text:style-name="P5">      <text:span text:style-name="T13">&lt;</text:span><text:span text:style-name="T1">? } ?&gt;</text:span></text:p>
      <text:p text:style-name="P6"/>
      <text:p text:style-name="P5">    <text:span text:style-name="T13">&lt;/</text:span><text:span text:style-name="T4">div</text:span><text:span text:style-name="T13">&gt;</text:span></text:p>
      <text:p text:style-name="P6"/>
      <text:p text:style-name="P5">    <text:span text:style-name="T13">&lt;</text:span><text:span text:style-name="T4">script</text:span><text:span text:style-name="T1"> </text:span><text:span text:style-name="T9">type</text:span><text:span text:style-name="T13">=</text:span><text:span text:style-name="T7">"text/javascript"</text:span><text:span text:style-name="T1"> </text:span><text:span text:style-name="T9">src</text:span><text:span text:style-name="T13">=</text:span><text:span text:style-name="T7">"https://www.gstatic.com/charts/loader.js"</text:span><text:span text:style-name="T13">&gt;&lt;/</text:span><text:span text:style-name="T4">script</text:span><text:span text:style-name="T13">&gt;</text:span></text:p>
      <text:p text:style-name="P5">    <text:span text:style-name="T13">&lt;</text:span><text:span text:style-name="T4">script</text:span><text:span text:style-name="T1"> </text:span><text:span text:style-name="T9">type</text:span><text:span text:style-name="T13">=</text:span><text:span text:style-name="T7">"text/javascript"</text:span><text:span text:style-name="T13">&gt;</text:span></text:p>
      <text:p text:style-name="P5">      <text:span text:style-name="T5">google</text:span><text:span text:style-name="T1">.</text:span><text:span text:style-name="T5">charts</text:span><text:span text:style-name="T1">.</text:span><text:span text:style-name="T5">load</text:span><text:span text:style-name="T1">(</text:span><text:span text:style-name="T7">'current'</text:span><text:span text:style-name="T1">, {</text:span><text:span text:style-name="T7">'packages'</text:span><text:span text:style-name="T1">:[</text:span><text:span text:style-name="T7">'corechart'</text:span><text:span text:style-name="T1">]});</text:span></text:p>
      <text:p text:style-name="P5">      <text:span text:style-name="T5">google</text:span><text:span text:style-name="T1">.</text:span><text:span text:style-name="T5">charts</text:span><text:span text:style-name="T1">.</text:span><text:span text:style-name="T5">setOnLoadCallback</text:span><text:span text:style-name="T1">(</text:span><text:span text:style-name="T5">dibujarGrafico</text:span><text:span text:style-name="T1">);</text:span></text:p>
      <text:p text:style-name="P6"/>
      <text:p text:style-name="P5">      <text:span text:style-name="T4">function</text:span><text:span text:style-name="T1"> </text:span><text:span text:style-name="T5">dibujarGrafico</text:span><text:span text:style-name="T1">() {</text:span></text:p>
      <text:p text:style-name="P5">        <text:span text:style-name="T4">var</text:span><text:span text:style-name="T1"> </text:span><text:span text:style-name="T5">bajas</text:span><text:span text:style-name="T1"> = </text:span><text:span text:style-name="T6">Number</text:span><text:span text:style-name="T1">(</text:span><text:span text:style-name="T7">"&lt;?= totalBajas ?&gt;"</text:span><text:span text:style-name="T1">);</text:span></text:p>
      <text:p text:style-name="P5">        <text:span text:style-name="T4">var</text:span><text:span text:style-name="T1"> </text:span><text:span text:style-name="T5">total</text:span><text:span text:style-name="T1"> = </text:span><text:span text:style-name="T6">Number</text:span><text:span text:style-name="T1">(</text:span><text:span text:style-name="T7">"&lt;?= totalClientes ?&gt;"</text:span><text:span text:style-name="T1">);</text:span></text:p>
      <text:p text:style-name="P5">        <text:span text:style-name="T4">var</text:span><text:span text:style-name="T1"> </text:span><text:span text:style-name="T5">activos</text:span><text:span text:style-name="T1"> = </text:span><text:span text:style-name="T5">total</text:span><text:span text:style-name="T1"> - </text:span><text:span text:style-name="T5">bajas</text:span><text:span text:style-name="T1">;</text:span></text:p>
      <text:p text:style-name="P6"/>
      <text:p text:style-name="P5">        <text:span text:style-name="T4">var</text:span><text:span text:style-name="T1"> </text:span><text:span text:style-name="T5">data</text:span><text:span text:style-name="T1"> = </text:span><text:span text:style-name="T5">google</text:span><text:span text:style-name="T1">.</text:span><text:span text:style-name="T5">visualization</text:span><text:span text:style-name="T1">.</text:span><text:span text:style-name="T5">arrayToDataTable</text:span><text:span text:style-name="T1">([</text:span></text:p>
      <text:p text:style-name="P5">          <text:span text:style-name="T1">[</text:span><text:span text:style-name="T7">'Estado'</text:span><text:span text:style-name="T1">, </text:span><text:span text:style-name="T7">'Clientes'</text:span><text:span text:style-name="T1">],</text:span></text:p>
      <text:p text:style-name="P5">          <text:span text:style-name="T1">[</text:span><text:span text:style-name="T7">'Activos'</text:span><text:span text:style-name="T1">, </text:span><text:span text:style-name="T5">activos</text:span><text:span text:style-name="T1">],</text:span></text:p>
      <text:p text:style-name="P5">          <text:span text:style-name="T1">[</text:span><text:span text:style-name="T7">'Bajas'</text:span><text:span text:style-name="T1">, </text:span><text:span text:style-name="T5">bajas</text:span><text:span text:style-name="T1">]</text:span></text:p>
      <text:p text:style-name="P5">        <text:span text:style-name="T1">]);</text:span></text:p>
      <text:p text:style-name="P6"/>
      <text:p text:style-name="P5">        <text:span text:style-name="T4">var</text:span><text:span text:style-name="T1"> </text:span><text:span text:style-name="T5">options</text:span><text:span text:style-name="T1"> = {</text:span></text:p>
      <text:p text:style-name="P5">          <text:span text:style-name="T5">pieHole</text:span><text:span text:style-name="T1">: </text:span><text:span text:style-name="T9">0.5</text:span><text:span text:style-name="T1">,</text:span></text:p>
      <text:p text:style-name="P5">          <text:span text:style-name="T5">backgroundColor</text:span><text:span text:style-name="T1">: </text:span><text:span text:style-name="T7">'transparent'</text:span><text:span text:style-name="T1">,</text:span></text:p>
      <text:p text:style-name="P5">          <text:span text:style-name="T5">legend</text:span><text:span text:style-name="T1">: { </text:span><text:span text:style-name="T5">position</text:span><text:span text:style-name="T1">: </text:span><text:span text:style-name="T7">'bottom'</text:span><text:span text:style-name="T1">, </text:span><text:span text:style-name="T5">textStyle</text:span><text:span text:style-name="T1">: { </text:span><text:span text:style-name="T5">color</text:span><text:span text:style-name="T1">: </text:span><text:span text:style-name="T7">'#ffffff'</text:span><text:span text:style-name="T1">, </text:span><text:span text:style-name="T5">fontSize</text:span><text:span text:style-name="T1">: </text:span><text:span text:style-name="T9">11</text:span><text:span text:style-name="T1"> } },</text:span></text:p>
      <text:p text:style-name="P5">          <text:span text:style-name="T5">colors</text:span><text:span text:style-name="T1">: [</text:span><text:span text:style-name="T7">'#10b981'</text:span><text:span text:style-name="T1">, </text:span><text:span text:style-name="T7">'&lt;?= colorAlerta ?&gt;'</text:span><text:span text:style-name="T1">],</text:span></text:p>
      <text:p text:style-name="P5">          <text:span text:style-name="T5">chartArea</text:span><text:span text:style-name="T1">: { </text:span><text:span text:style-name="T5">width</text:span><text:span text:style-name="T1">: </text:span><text:span text:style-name="T7">'100%'</text:span><text:span text:style-name="T1">, </text:span><text:span text:style-name="T5">height</text:span><text:span text:style-name="T1">: </text:span><text:span text:style-name="T7">'80%'</text:span><text:span text:style-name="T1"> },</text:span></text:p>
      <text:p text:style-name="P5">          <text:span text:style-name="T5">pieSliceBorderColor</text:span><text:span text:style-name="T1">: </text:span><text:span text:style-name="T7">'transparent'</text:span><text:span text:style-name="T1">,</text:span></text:p>
      <text:p text:style-name="P5">          <text:span text:style-name="T5">pieSliceText</text:span><text:span text:style-name="T1">: </text:span><text:span text:style-name="T7">'none'</text:span></text:p>
      <text:p text:style-name="P5">        <text:span text:style-name="T1">};</text:span></text:p>
      <text:p text:style-name="P6"/>
      <text:p text:style-name="P5">        <text:span text:style-name="T4">var</text:span><text:span text:style-name="T1"> </text:span><text:span text:style-name="T5">chart</text:span><text:span text:style-name="T1"> = </text:span><text:span text:style-name="T4">new</text:span><text:span text:style-name="T1"> </text:span><text:span text:style-name="T5">google</text:span><text:span text:style-name="T1">.</text:span><text:span text:style-name="T5">visualization</text:span><text:span text:style-name="T1">.</text:span><text:span text:style-name="T6">PieChart</text:span><text:span text:style-name="T1">(</text:span><text:span text:style-name="T5">document</text:span><text:span text:style-name="T1">.</text:span><text:span text:style-name="T5">getElementById</text:span><text:span text:style-name="T1">(</text:span><text:span text:style-name="T7">'grafico_donut'</text:span><text:span text:style-name="T1">));</text:span></text:p>
      <text:p text:style-name="P5">        <text:span text:style-name="T5">chart</text:span><text:span text:style-name="T1">.</text:span><text:span text:style-name="T5">draw</text:span><text:span text:style-name="T1">(</text:span><text:span text:style-name="T5">data</text:span><text:span text:style-name="T1">, </text:span><text:span text:style-name="T5">options</text:span><text:span text:style-name="T1">);</text:span></text:p>
      <text:p text:style-name="P5">      <text:span text:style-name="T1">}</text:span></text:p>
      <text:p text:style-name="P6"/>
      <text:p text:style-name="P5">      <text:span text:style-name="T4">function</text:span><text:span text:style-name="T1"> </text:span><text:span text:style-name="T5">enviarConCarga</text:span><text:span text:style-name="T1">() {</text:span></text:p>
      <text:p text:style-name="P5">        <text:span text:style-name="T5">document</text:span><text:span text:style-name="T1">.</text:span><text:span text:style-name="T5">getElementById</text:span><text:span text:style-name="T1">(</text:span><text:span text:style-name="T7">'btnEnviar'</text:span><text:span text:style-name="T1">).</text:span><text:span text:style-name="T5">style</text:span><text:span text:style-name="T1">.</text:span><text:span text:style-name="T5">display</text:span><text:span text:style-name="T1"> = </text:span><text:span text:style-name="T7">'none'</text:span><text:span text:style-name="T1">;</text:span></text:p>
      <text:p text:style-name="P5"><text:soft-page-break/>        <text:span text:style-name="T5">document</text:span><text:span text:style-name="T1">.</text:span><text:span text:style-name="T5">getElementById</text:span><text:span text:style-name="T1">(</text:span><text:span text:style-name="T7">'msgCarga'</text:span><text:span text:style-name="T1">).</text:span><text:span text:style-name="T5">style</text:span><text:span text:style-name="T1">.</text:span><text:span text:style-name="T5">display</text:span><text:span text:style-name="T1"> = </text:span><text:span text:style-name="T7">'block'</text:span><text:span text:style-name="T1">;</text:span></text:p>
      <text:p text:style-name="P5">        <text:span text:style-name="T5">google</text:span><text:span text:style-name="T1">.</text:span><text:span text:style-name="T5">script</text:span><text:span text:style-name="T1">.</text:span><text:span text:style-name="T5">run</text:span></text:p>
      <text:p text:style-name="P5">          <text:span text:style-name="T1">.</text:span><text:span text:style-name="T5">withSuccessHandler</text:span><text:span text:style-name="T1">(() =&gt; {</text:span></text:p>
      <text:p text:style-name="P5">            <text:span text:style-name="T5">alert</text:span><text:span text:style-name="T1">(</text:span><text:span text:style-name="T7">"✅ ¡Informe enviado con éxito!"</text:span><text:span text:style-name="T1">);</text:span></text:p>
      <text:p text:style-name="P5">            <text:span text:style-name="T5">google</text:span><text:span text:style-name="T1">.</text:span><text:span text:style-name="T5">script</text:span><text:span text:style-name="T1">.</text:span><text:span text:style-name="T5">host</text:span><text:span text:style-name="T1">.</text:span><text:span text:style-name="T5">close</text:span><text:span text:style-name="T1">();</text:span></text:p>
      <text:p text:style-name="P5">          <text:span text:style-name="T1">})</text:span></text:p>
      <text:p text:style-name="P5">          <text:span text:style-name="T1">.</text:span><text:span text:style-name="T5">enviarCorreoDashboard</text:span><text:span text:style-name="T1">();</text:span></text:p>
      <text:p text:style-name="P5">      <text:span text:style-name="T1">}</text:span></text:p>
      <text:p text:style-name="P5">    <text:span text:style-name="T13">&lt;/</text:span><text:span text:style-name="T4">script</text:span><text:span text:style-name="T13">&gt;</text:span></text:p>
      <text:p text:style-name="P5">  <text:span text:style-name="T13">&lt;/</text:span><text:span text:style-name="T4">body</text:span><text:span text:style-name="T13">&gt;</text:span></text:p>
      <text:p text:style-name="P4"><text:span text:style-name="T12">&lt;/</text:span><text:span text:style-name="T2">html</text:span><text:span text:style-name="T12">&gt;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 Mono" svg:font-family="'Roboto Mono', Consolas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1T08:41:38.597390100</meta:creation-date>
    <dc:date>2026-05-21T08:44:08.221660800</dc:date>
    <meta:editing-duration>PT2M30S</meta:editing-duration>
    <meta:editing-cycles>1</meta:editing-cycles>
    <meta:document-statistic meta:table-count="0" meta:image-count="0" meta:object-count="0" meta:page-count="15" meta:paragraph-count="634" meta:word-count="2474" meta:character-count="23229" meta:non-whitespace-character-count="18149"/>
    <meta:generator>LibreOffice/25.2.5.2$Windows_X86_64 LibreOffice_project/03d19516eb2e1dd5d4ccd751a0d6f35f35e08022</meta:generator>
  </office:meta>
</office:document-meta>
</file>